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Liberation Serif" svg:font-family="'Liberation Serif'" style:font-adornments="Negrito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  <style:map style:condition="is-true-formula(AND([.C4]&lt;&gt;&quot;&quot;; [.C4]=[.$J$17]))" style:apply-style-name="Background" style:base-cell-address="C111.C4"/>
    </style:style>
    <style:style style:name="ce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color="#666666"/>
      <style:map style:condition="is-true-formula(AND([.C4]&lt;&gt;&quot;&quot;; [.C4]=[.$J$17]))" style:apply-style-name="Background" style:base-cell-address="C111.C4"/>
    </style:style>
    <style:style style:name="ce27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  <style:map style:condition="is-true-formula(AND([.C4]&lt;&gt;&quot;&quot;; [.C4]=[.$J$17]))" style:apply-style-name="Background" style:base-cell-address="C111.C4"/>
    </style:style>
    <style:style style:name="ce2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map style:condition="is-true-formula(AND([.C4]&lt;&gt;&quot;&quot;; [.C4]=[.$J$17]))" style:apply-style-name="Background" style:base-cell-address="C111.C4"/>
    </style:style>
    <style:style style:name="ce10" style:family="table-cell" style:parent-style-name="Default">
      <style:table-cell-properties fo:background-color="transparent" fo:border="none"/>
      <style:text-properties style:font-name="Liberation Mono" style:font-name-asian="Liberation Mono" style:font-name-complex="Liberation Mono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AND([.C4]&lt;&gt;&quot;&quot;; [.C4]=[.$J$17]))" style:apply-style-name="Background" style:base-cell-address="C111.C4"/>
    </style:style>
    <style:style style:name="ce31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map style:condition="is-true-formula(AND([.C4]&lt;&gt;&quot;&quot;; [.C4]=[.$J$17]))" style:apply-style-name="Background" style:base-cell-address="C111.C4"/>
    </style:style>
    <style:style style:name="ce16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color="#666666"/>
      <style:map style:condition="is-true-formula(AND([.C4]&lt;&gt;&quot;&quot;; [.C4]=[.$J$17]))" style:apply-style-name="Background" style:base-cell-address="C111.C4"/>
    </style:style>
    <style:style style:name="ce3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map style:condition="is-true-formula(AND([.C4]&lt;&gt;&quot;&quot;; [.C4]=[.$J$17]))" style:apply-style-name="Background" style:base-cell-address="C111.C4"/>
    </style:style>
    <style:style style:name="ce3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map style:condition="is-true-formula(AND([.C4]&lt;&gt;&quot;&quot;; [.C4]=[.$J$17]))" style:apply-style-name="Background" style:base-cell-address="C111.C4"/>
    </style:style>
    <style:style style:name="ce17" style:family="table-cell" style:parent-style-name="Default">
      <style:table-cell-properties fo:background-color="transparent" fo:border="none"/>
    </style:style>
    <style:style style:name="ce2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color="#666666"/>
      <style:map style:condition="is-true-formula(AND([.C4]&lt;&gt;&quot;&quot;; [.C4]=[.$J$17]))" style:apply-style-name="Background" style:base-cell-address="C111.C4"/>
    </style:style>
    <style:style style:name="ce37" style:family="table-cell" style:parent-style-name="Default">
      <style:table-cell-properties fo:border="0.74pt solid #000000"/>
      <style:map style:condition="is-true-formula([.K4]=0)" style:apply-style-name="Good" style:base-cell-address="C111.I4"/>
      <style:map style:condition="is-true-formula([.K4]&lt;0)" style:apply-style-name="Error" style:base-cell-address="C111.I4"/>
    </style:style>
    <style:style style:name="ce38" style:family="table-cell" style:parent-style-name="Default">
      <style:table-cell-properties fo:background-color="#729fcf" fo:border="0.74pt solid #000000"/>
    </style:style>
    <style:style style:name="ce36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  <style:map style:condition="is-true-formula(AND([.C4]&lt;&gt;&quot;&quot;; [.C4]=[.$J$17]))" style:apply-style-name="Background" style:base-cell-address="C112.C4"/>
    </style:style>
    <style:style style:name="ce2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color="#666666"/>
      <style:map style:condition="is-true-formula(AND([.C4]&lt;&gt;&quot;&quot;; [.C4]=[.$J$17]))" style:apply-style-name="Background" style:base-cell-address="C112.C4"/>
    </style:style>
    <style:style style:name="ce41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  <style:map style:condition="is-true-formula(AND([.C4]&lt;&gt;&quot;&quot;; [.C4]=[.$J$17]))" style:apply-style-name="Background" style:base-cell-address="C112.C4"/>
    </style:style>
    <style:style style:name="ce4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map style:condition="is-true-formula(AND([.C4]&lt;&gt;&quot;&quot;; [.C4]=[.$J$17]))" style:apply-style-name="Background" style:base-cell-address="C112.C4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AND([.C4]&lt;&gt;&quot;&quot;; [.C4]=[.$J$17]))" style:apply-style-name="Background" style:base-cell-address="C112.C4"/>
    </style:style>
    <style:style style:name="ce4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map style:condition="is-true-formula(AND([.C4]&lt;&gt;&quot;&quot;; [.C4]=[.$J$17]))" style:apply-style-name="Background" style:base-cell-address="C112.C4"/>
    </style:style>
    <style:style style:name="ce32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color="#666666"/>
      <style:map style:condition="is-true-formula(AND([.C4]&lt;&gt;&quot;&quot;; [.C4]=[.$J$17]))" style:apply-style-name="Background" style:base-cell-address="C112.C4"/>
    </style:style>
    <style:style style:name="ce46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map style:condition="is-true-formula(AND([.C4]&lt;&gt;&quot;&quot;; [.C4]=[.$J$17]))" style:apply-style-name="Background" style:base-cell-address="C112.C4"/>
    </style:style>
    <style:style style:name="ce47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map style:condition="is-true-formula(AND([.C4]&lt;&gt;&quot;&quot;; [.C4]=[.$J$17]))" style:apply-style-name="Background" style:base-cell-address="C112.C4"/>
    </style:style>
    <style:style style:name="ce48" style:family="table-cell" style:parent-style-name="Default">
      <style:table-cell-properties fo:border="0.74pt solid #000000"/>
      <style:map style:condition="is-true-formula([.K4]=0)" style:apply-style-name="Good" style:base-cell-address="C112.I4"/>
      <style:map style:condition="is-true-formula([.K4]&lt;0)" style:apply-style-name="Error" style:base-cell-address="C112.I4"/>
    </style:style>
    <style:style style:name="ce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  <style:map style:condition="is-true-formula(AND([.C4]&lt;&gt;&quot;&quot;; [.C4]=[.$J$17]))" style:apply-style-name="Background" style:base-cell-address="C113.C4"/>
    </style:style>
    <style:style style:name="ce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color="#666666"/>
      <style:map style:condition="is-true-formula(AND([.C4]&lt;&gt;&quot;&quot;; [.C4]=[.$J$17]))" style:apply-style-name="Background" style:base-cell-address="C113.C4"/>
    </style:style>
    <style:style style:name="ce51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  <style:map style:condition="is-true-formula(AND([.C4]&lt;&gt;&quot;&quot;; [.C4]=[.$J$17]))" style:apply-style-name="Background" style:base-cell-address="C113.C4"/>
    </style:style>
    <style:style style:name="ce5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map style:condition="is-true-formula(AND([.C4]&lt;&gt;&quot;&quot;; [.C4]=[.$J$17]))" style:apply-style-name="Background" style:base-cell-address="C113.C4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AND([.C4]&lt;&gt;&quot;&quot;; [.C4]=[.$J$17]))" style:apply-style-name="Background" style:base-cell-address="C113.C4"/>
    </style:style>
    <style:style style:name="ce5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map style:condition="is-true-formula(AND([.C4]&lt;&gt;&quot;&quot;; [.C4]=[.$J$17]))" style:apply-style-name="Background" style:base-cell-address="C113.C4"/>
    </style:style>
    <style:style style:name="ce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color="#666666"/>
      <style:map style:condition="is-true-formula(AND([.C4]&lt;&gt;&quot;&quot;; [.C4]=[.$J$17]))" style:apply-style-name="Background" style:base-cell-address="C113.C4"/>
    </style:style>
    <style:style style:name="ce56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map style:condition="is-true-formula(AND([.C4]&lt;&gt;&quot;&quot;; [.C4]=[.$J$17]))" style:apply-style-name="Background" style:base-cell-address="C113.C4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map style:condition="is-true-formula(AND([.C4]&lt;&gt;&quot;&quot;; [.C4]=[.$J$17]))" style:apply-style-name="Background" style:base-cell-address="C113.C4"/>
    </style:style>
    <style:style style:name="ce59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map style:condition="is-true-formula(AND([.C4]&lt;&gt;&quot;&quot;; [.C4]=[.$J$17]))" style:apply-style-name="Background" style:base-cell-address="C113.C4"/>
    </style:style>
    <style:style style:name="ce65" style:family="table-cell" style:parent-style-name="Default">
      <style:table-cell-properties fo:border="0.74pt solid #000000"/>
      <style:map style:condition="is-true-formula([.K4]=0)" style:apply-style-name="Good" style:base-cell-address="C113.I4"/>
      <style:map style:condition="is-true-formula([.K4]&lt;0)" style:apply-style-name="Error" style:base-cell-address="C113.I4"/>
    </style:style>
    <style:style style:name="ce63" style:family="table-cell" style:parent-style-name="Default">
      <style:table-cell-properties fo:background-color="transparent"/>
    </style:style>
    <style:style style:name="ce64" style:family="table-cell" style:parent-style-name="Default">
      <style:table-cell-properties fo:background-color="#ec9ba4" fo:border="0.74pt solid #000000"/>
    </style:style>
    <style:style style:name="ce14" style:family="table-cell" style:parent-style-name="Default">
      <style:table-cell-properties fo:border="none"/>
    </style:style>
    <style:style style:name="ce69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C111.$N$4:.$N$13])" table:allow-empty-cell="true" table:display-list="unsorted" table:base-cell-address="C111.A21">
          <table:error-message table:message-type="stop" table:display="true"/>
        </table:content-validation>
        <table:content-validation table:name="val2" table:base-cell-address="C111.G5">
          <table:error-message table:message-type="stop" table:display="true"/>
        </table:content-validation>
        <table:content-validation table:name="val3" table:condition="of:cell-content-is-in-list([.$I$4:.$I$14])" table:allow-empty-cell="true" table:display-list="unsorted" table:base-cell-address="C111.J20">
          <table:error-message table:message-type="stop" table:display="true"/>
        </table:content-validation>
        <table:content-validation table:name="val4" table:base-cell-address="C113.I22">
          <table:help-message table:title="Posibles asignaturas" table:display="true"/>
          <table:error-message table:message-type="information" table:title="Ese valor no existe" table:display="true">
            <text:p>Igual, lo puedes dejar si quieres</text:p>
          </table:error-message>
        </table:content-validation>
      </table:content-validations>
      <table:table table:name="C111" table:style-name="ta1">
        <table:table-column table:style-name="co1" table:default-cell-style-name="Default"/>
        <table:table-column table:style-name="co1" table:number-columns-repeated="6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rupo </text:p>
          </table:table-cell>
          <table:table-cell table:style-name="Default" office:value-type="string" calcext:value-type="string">
            <text:p>C111</text:p>
          </table:table-cell>
          <table:table-cell table:style-name="Default" table:number-columns-repeated="5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Lunes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string" calcext:value-type="string">
            <text:p>Jueves </text:p>
          </table:table-cell>
          <table:table-cell table:style-name="ce1" office:value-type="string" calcext:value-type="string">
            <text:p>Viernes</text:p>
          </table:table-cell>
          <table:table-cell/>
          <table:table-cell table:style-name="ce1" office:value-type="string" calcext:value-type="string">
            <text:p>Asignaturas</text:p>
          </table:table-cell>
          <table:table-cell office:value-type="string" calcext:value-type="string">
            <text:p>Frec</text:p>
          </table:table-cell>
          <table:table-cell office:value-type="string" calcext:value-type="string">
            <text:p>Faltan</text:p>
          </table:table-cell>
          <table:table-cell office:value-type="string" calcext:value-type="string">
            <text:p>Asignadas</text:p>
          </table:table-cell>
          <table:table-cell/>
          <table:table-cell table:style-name="ce1" office:value-type="string" calcext:value-type="string">
            <text:p>Aulas</text:p>
          </table:table-cell>
        </table:table-row>
        <table:table-row table:style-name="ro1">
          <table:table-cell/>
          <table:table-cell table:style-name="ce39" office:value-type="string" calcext:value-type="string" table:number-columns-spanned="1" table:number-rows-spanned="2">
            <text:p>1er Turno</text:p>
          </table:table-cell>
          <table:table-cell table:style-name="ce24" office:value-type="string" calcext:value-type="string">
            <text:p>L-C</text:p>
          </table:table-cell>
          <table:table-cell table:style-name="ce30" office:value-type="string" calcext:value-type="string">
            <text:p>Pro-C</text:p>
          </table:table-cell>
          <table:table-cell table:style-name="ce24" office:value-type="string" calcext:value-type="string">
            <text:p>AM1-CP</text:p>
          </table:table-cell>
          <table:table-cell table:style-name="ce24" office:value-type="string" calcext:value-type="string">
            <text:p>F-CP</text:p>
          </table:table-cell>
          <table:table-cell table:style-name="ce24"/>
          <table:table-cell/>
          <table:table-cell table:style-name="ce37" office:value-type="string" calcext:value-type="string">
            <text:p>Pro-C</text:p>
          </table:table-cell>
          <table:table-cell office:value-type="float" office:value="1" calcext:value-type="float">
            <text:p>1</text:p>
          </table:table-cell>
          <table:table-cell table:formula="of:=[.J4]-[.L4]" office:value-type="float" office:value="0" calcext:value-type="float">
            <text:p>0</text:p>
          </table:table-cell>
          <table:table-cell table:formula="of:=COUNTIF([.$C$4:.$G$17];[.I4])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1"/>
          <table:table-cell table:number-columns-repeated="4" table:style-name="ce8" office:value-type="float" office:value="6" calcext:value-type="float">
            <text:p>6</text:p>
          </table:table-cell>
          <table:table-cell table:style-name="ce21" table:content-validation-name="val2"/>
          <table:table-cell/>
          <table:table-cell table:style-name="ce37" office:value-type="string" calcext:value-type="string">
            <text:p>Pro-CP</text:p>
          </table:table-cell>
          <table:table-cell office:value-type="float" office:value="2" calcext:value-type="float">
            <text:p>2</text:p>
          </table:table-cell>
          <table:table-cell table:formula="of:=[.J5]-[.L5]" office:value-type="float" office:value="0" calcext:value-type="float">
            <text:p>0</text:p>
          </table:table-cell>
          <table:table-cell table:formula="of:=COUNTIF([.$C$4:.$G$17];[.I5])" office:value-type="float" office:value="2" calcext:value-type="float">
            <text:p>2</text:p>
          </table:table-cell>
          <table:table-cell/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9" office:value-type="string" calcext:value-type="string" table:number-columns-spanned="1" table:number-rows-spanned="2">
            <text:p>2do Turno</text:p>
          </table:table-cell>
          <table:table-cell table:style-name="ce24" office:value-type="string" calcext:value-type="string">
            <text:p>AM1-C</text:p>
          </table:table-cell>
          <table:table-cell table:style-name="ce31" office:value-type="string" calcext:value-type="string">
            <text:p>F-C</text:p>
          </table:table-cell>
          <table:table-cell table:style-name="ce31" office:value-type="string" calcext:value-type="string">
            <text:p>EF</text:p>
          </table:table-cell>
          <table:table-cell table:style-name="ce31" office:value-type="string" calcext:value-type="string">
            <text:p>Pro-CP</text:p>
          </table:table-cell>
          <table:table-cell table:style-name="ce31"/>
          <table:table-cell/>
          <table:table-cell table:style-name="ce37" office:value-type="string" calcext:value-type="string">
            <text:p>A1-C</text:p>
          </table:table-cell>
          <table:table-cell office:value-type="float" office:value="2" calcext:value-type="float">
            <text:p>2</text:p>
          </table:table-cell>
          <table:table-cell table:formula="of:=[.J6]-[.L6]" office:value-type="float" office:value="0" calcext:value-type="float">
            <text:p>0</text:p>
          </table:table-cell>
          <table:table-cell table:formula="of:=COUNTIF([.$C$4:.$G$17];[.I6])" office:value-type="float" office:value="2" calcext:value-type="float">
            <text:p>2</text:p>
          </table:table-cell>
          <table:table-cell/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1"/>
          <table:table-cell table:style-name="ce8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SEDER</text:p>
          </table:table-cell>
          <table:table-cell table:style-name="ce16" office:value-type="float" office:value="6" calcext:value-type="float">
            <text:p>6</text:p>
          </table:table-cell>
          <table:table-cell table:style-name="ce16"/>
          <table:table-cell/>
          <table:table-cell table:style-name="ce37" office:value-type="string" calcext:value-type="string">
            <text:p>A1-CP</text:p>
          </table:table-cell>
          <table:table-cell office:value-type="float" office:value="1" calcext:value-type="float">
            <text:p>1</text:p>
          </table:table-cell>
          <table:table-cell table:formula="of:=[.J7]-[.L7]" office:value-type="float" office:value="0" calcext:value-type="float">
            <text:p>0</text:p>
          </table:table-cell>
          <table:table-cell table:formula="of:=COUNTIF([.$C$4:.$G$17];[.I7])" office:value-type="float" office:value="1" calcext:value-type="float">
            <text:p>1</text:p>
          </table:table-cell>
          <table:table-cell/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9" office:value-type="string" calcext:value-type="string" table:number-columns-spanned="1" table:number-rows-spanned="2">
            <text:p>3er Turno</text:p>
          </table:table-cell>
          <table:table-cell table:style-name="ce24" office:value-type="string" calcext:value-type="string">
            <text:p>A1-C</text:p>
          </table:table-cell>
          <table:table-cell table:style-name="ce31" office:value-type="string" calcext:value-type="string">
            <text:p>A1-C</text:p>
          </table:table-cell>
          <table:table-cell table:style-name="ce31" office:value-type="string" calcext:value-type="string">
            <text:p>L-CP</text:p>
          </table:table-cell>
          <table:table-cell table:style-name="ce31" office:value-type="string" calcext:value-type="string">
            <text:p>A1-CP</text:p>
          </table:table-cell>
          <table:table-cell table:style-name="ce31" office:value-type="string" calcext:value-type="string">
            <text:p>Pro-CP</text:p>
          </table:table-cell>
          <table:table-cell/>
          <table:table-cell table:style-name="ce37" office:value-type="string" calcext:value-type="string">
            <text:p>AM1-C</text:p>
          </table:table-cell>
          <table:table-cell office:value-type="float" office:value="1" calcext:value-type="float">
            <text:p>1</text:p>
          </table:table-cell>
          <table:table-cell table:formula="of:=[.J8]-[.L8]" office:value-type="float" office:value="0" calcext:value-type="float">
            <text:p>0</text:p>
          </table:table-cell>
          <table:table-cell table:formula="of:=COUNTIF([.$C$4:.$G$17];[.I8])" office:value-type="float" office:value="1" calcext:value-type="float">
            <text:p>1</text:p>
          </table:table-cell>
          <table:table-cell/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/>
          <table:covered-table-cell table:style-name="ce1"/>
          <table:table-cell table:style-name="ce8" office:value-type="float" office:value="6" calcext:value-type="float">
            <text:p>6</text:p>
          </table:table-cell>
          <table:table-cell table:number-columns-repeated="3" table:style-name="ce16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/>
          <table:table-cell table:style-name="ce37" office:value-type="string" calcext:value-type="string">
            <text:p>AM1-CP</text:p>
          </table:table-cell>
          <table:table-cell office:value-type="float" office:value="1" calcext:value-type="float">
            <text:p>1</text:p>
          </table:table-cell>
          <table:table-cell table:formula="of:=[.J9]-[.L9]" office:value-type="float" office:value="0" calcext:value-type="float">
            <text:p>0</text:p>
          </table:table-cell>
          <table:table-cell table:formula="of:=COUNTIF([.$C$4:.$G$17];[.I9])" office:value-type="float" office:value="1" calcext:value-type="float">
            <text:p>1</text:p>
          </table:table-cell>
          <table:table-cell/>
          <table:table-cell table:style-name="ce1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39" table:number-columns-spanned="1" table:number-rows-spanned="2"/>
          <table:table-cell table:style-name="ce27"/>
          <table:table-cell table:style-name="ce33" table:number-columns-repeated="4"/>
          <table:table-cell/>
          <table:table-cell table:style-name="ce37" office:value-type="string" calcext:value-type="string">
            <text:p>L-C</text:p>
          </table:table-cell>
          <table:table-cell office:value-type="float" office:value="1" calcext:value-type="float">
            <text:p>1</text:p>
          </table:table-cell>
          <table:table-cell table:formula="of:=[.J10]-[.L10]" office:value-type="float" office:value="0" calcext:value-type="float">
            <text:p>0</text:p>
          </table:table-cell>
          <table:table-cell table:formula="of:=COUNTIF([.$C$4:.$G$17];[.I10])" office:value-type="float" office:value="1" calcext:value-type="float">
            <text:p>1</text:p>
          </table:table-cell>
          <table:table-cell/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/>
          <table:covered-table-cell table:style-name="ce1"/>
          <table:table-cell table:style-name="ce28"/>
          <table:table-cell table:style-name="ce34" table:number-columns-repeated="4"/>
          <table:table-cell/>
          <table:table-cell table:style-name="ce37" office:value-type="string" calcext:value-type="string">
            <text:p>L-CP</text:p>
          </table:table-cell>
          <table:table-cell office:value-type="float" office:value="1" calcext:value-type="float">
            <text:p>1</text:p>
          </table:table-cell>
          <table:table-cell table:formula="of:=[.J11]-[.L11]" office:value-type="float" office:value="0" calcext:value-type="float">
            <text:p>0</text:p>
          </table:table-cell>
          <table:table-cell table:formula="of:=COUNTIF([.$C$4:.$G$17];[.I11])" office:value-type="float" office:value="1" calcext:value-type="float">
            <text:p>1</text:p>
          </table:table-cell>
          <table:table-cell/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39" office:value-type="string" calcext:value-type="string" table:number-columns-spanned="1" table:number-rows-spanned="2">
            <text:p>4to Turno</text:p>
          </table:table-cell>
          <table:table-cell table:style-name="ce24"/>
          <table:table-cell table:style-name="ce31" table:number-columns-repeated="4"/>
          <table:table-cell/>
          <table:table-cell table:style-name="ce37" office:value-type="string" calcext:value-type="string">
            <text:p>F-C</text:p>
          </table:table-cell>
          <table:table-cell office:value-type="float" office:value="1" calcext:value-type="float">
            <text:p>1</text:p>
          </table:table-cell>
          <table:table-cell table:formula="of:=[.J12]-[.L12]" office:value-type="float" office:value="0" calcext:value-type="float">
            <text:p>0</text:p>
          </table:table-cell>
          <table:table-cell table:formula="of:=COUNTIF([.$C$4:.$G$17];[.I12])" office:value-type="float" office:value="1" calcext:value-type="float">
            <text:p>1</text:p>
          </table:table-cell>
          <table:table-cell/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/>
          <table:covered-table-cell table:style-name="ce1"/>
          <table:table-cell table:style-name="ce8"/>
          <table:table-cell table:style-name="ce16"/>
          <table:table-cell table:style-name="ce8"/>
          <table:table-cell table:style-name="ce16"/>
          <table:table-cell table:style-name="ce8"/>
          <table:table-cell/>
          <table:table-cell table:style-name="ce37" office:value-type="string" calcext:value-type="string">
            <text:p>F-CP</text:p>
          </table:table-cell>
          <table:table-cell office:value-type="float" office:value="1" calcext:value-type="float">
            <text:p>1</text:p>
          </table:table-cell>
          <table:table-cell table:formula="of:=[.J13]-[.L13]" office:value-type="float" office:value="0" calcext:value-type="float">
            <text:p>0</text:p>
          </table:table-cell>
          <table:table-cell table:formula="of:=COUNTIF([.$C$4:.$G$17];[.I13])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Lab</text:p>
          </table:table-cell>
        </table:table-row>
        <table:table-row table:style-name="ro1">
          <table:table-cell/>
          <table:table-cell table:style-name="ce39" office:value-type="string" calcext:value-type="string" table:number-columns-spanned="1" table:number-rows-spanned="2">
            <text:p>5to Turno</text:p>
          </table:table-cell>
          <table:table-cell table:style-name="ce24"/>
          <table:table-cell table:style-name="ce31" table:number-columns-repeated="4"/>
          <table:table-cell/>
          <table:table-cell table:style-name="ce37" office:value-type="string" calcext:value-type="string">
            <text:p>EF</text:p>
          </table:table-cell>
          <table:table-cell office:value-type="float" office:value="1" calcext:value-type="float">
            <text:p>1</text:p>
          </table:table-cell>
          <table:table-cell table:formula="of:=[.J14]-[.L14]" office:value-type="float" office:value="0" calcext:value-type="float">
            <text:p>0</text:p>
          </table:table-cell>
          <table:table-cell table:formula="of:=COUNTIF([.$C$4:.$G$17];[.I1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covered-table-cell table:style-name="ce1"/>
          <table:table-cell table:style-name="ce8"/>
          <table:table-cell table:style-name="ce16"/>
          <table:table-cell table:style-name="ce8"/>
          <table:table-cell table:style-name="ce16"/>
          <table:table-cell table:style-name="ce8"/>
          <table:table-cell/>
          <table:table-cell table:style-name="ce1"/>
          <table:table-cell table:number-columns-repeated="5"/>
        </table:table-row>
        <table:table-row table:style-name="ro1">
          <table:table-cell/>
          <table:table-cell table:style-name="ce39" office:value-type="string" calcext:value-type="string" table:number-columns-spanned="1" table:number-rows-spanned="2">
            <text:p>6to Turno</text:p>
          </table:table-cell>
          <table:table-cell table:style-name="ce24"/>
          <table:table-cell table:style-name="ce31" table:number-columns-repeated="4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covered-table-cell table:style-name="Default"/>
          <table:table-cell table:style-name="ce8"/>
          <table:table-cell table:style-name="ce16"/>
          <table:table-cell table:style-name="ce8"/>
          <table:table-cell table:style-name="ce16"/>
          <table:table-cell table:style-name="ce8"/>
          <table:table-cell/>
          <table:table-cell table:style-name="ce38" office:value-type="string" calcext:value-type="string">
            <text:p>Resaltar</text:p>
          </table:table-cell>
          <table:table-cell table:content-validation-name="val3" office:value-type="string" calcext:value-type="string">
            <text:p>Pro-CP</text:p>
          </table:table-cell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6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2"/>
          <table:table-cell table:number-columns-repeated="6"/>
          <table:table-cell table:style-name="ce2"/>
          <table:table-cell/>
          <table:table-cell table:style-name="ce2" table:number-columns-repeated="3"/>
          <table:table-cell table:number-columns-repeated="2"/>
        </table:table-row>
        <table:table-row table:style-name="ro1">
          <table:table-cell table:style-name="ce2" table:content-validation-name="val1"/>
          <table:table-cell/>
          <table:table-cell table:style-name="ce10"/>
          <table:table-cell table:style-name="ce17" table:number-columns-repeated="4"/>
          <table:table-cell table:style-name="ce2"/>
          <table:table-cell/>
          <table:table-cell table:style-name="ce2" table:number-columns-repeated="3"/>
          <table:table-cell table:number-columns-repeated="2"/>
        </table:table-row>
        <table:table-row table:style-name="ro1" table:number-rows-repeated="10">
          <table:table-cell table:style-name="ce2"/>
          <table:table-cell table:number-columns-repeated="6"/>
          <table:table-cell table:style-name="ce2"/>
          <table:table-cell/>
          <table:table-cell table:style-name="ce2" table:number-columns-repeated="3"/>
          <table:table-cell table:number-columns-repeated="2"/>
        </table:table-row>
        <table:table-row table:style-name="ro1">
          <table:table-cell table:style-name="ce2"/>
          <table:table-cell table:number-columns-repeated="6"/>
          <table:table-cell table:style-name="ce2"/>
          <table:table-cell/>
          <table:table-cell table:style-name="ce2" table:number-columns-repeated="3"/>
          <table:table-cell table:number-columns-repeated="2"/>
        </table:table-row>
        <calcext:conditional-formats>
          <calcext:conditional-format calcext:target-range-address="C111.I4:C111.I14">
            <calcext:condition calcext:apply-style-name="Good" calcext:value="formula-is([.K4]=0)" calcext:base-cell-address="C111.I4"/>
            <calcext:condition calcext:apply-style-name="Error" calcext:value="formula-is([.K4]&lt;0)" calcext:base-cell-address="C111.I4"/>
          </calcext:conditional-format>
          <calcext:conditional-format calcext:target-range-address="C111.C4:C111.G17">
            <calcext:condition calcext:apply-style-name="Background" calcext:value="formula-is(AND([.C4]&lt;&gt;&quot;&quot;; [.C4]=[.$J$17]))" calcext:base-cell-address="C111.C4"/>
          </calcext:conditional-format>
          <calcext:conditional-format calcext:target-range-address="C111.C4:C111.G4 C111.C6:C111.G6 C111.C8:C111.G8 C111.C12:C111.G12 C111.C14:C111.G14 C111.C16:C111.G16">
            <calcext:condition calcext:apply-style-name="Card TL" calcext:value="formula-is(AND([.C4]&lt;&gt;&quot;&quot;; COUNTIF([.$I$4:.$I$14];[.C4])=0))" calcext:base-cell-address="C111.C4"/>
          </calcext:conditional-format>
          <calcext:conditional-format calcext:target-range-address="C111.C5:C111.G5 C111.C7:C111.G7 C111.C9:C111.G9 C111.C13:C111.G13 C111.C15:C111.G15 C111.C17:C111.G17">
            <calcext:condition calcext:apply-style-name="Note" calcext:value="formula-is(AND([.C5]&lt;&gt;&quot;&quot;; COUNTIF([.$N$4:.$N$13];[.C5])=0))" calcext:base-cell-address="C111.C5"/>
          </calcext:conditional-format>
          <calcext:conditional-format calcext:target-range-address="C111.C5:C111.G5 C111.C7:C111.G7 C111.C9:C111.G9 C111.C13:C111.G13 C111.C15:C111.G15 C111.C17:C111.G17">
            <calcext:condition calcext:apply-style-name="Error" calcext:value="formula-is(AND([.C4]&lt;&gt;&quot;&quot;; [.C5]=&quot;&quot;))" calcext:base-cell-address="C111.C5"/>
          </calcext:conditional-format>
        </calcext:conditional-formats>
      </table:table>
      <table:table table:name="C112" table:style-name="ta1">
        <table:table-column table:style-name="co1" table:default-cell-style-name="Default"/>
        <table:table-column table:style-name="co1" table:default-cell-style-name="ce39"/>
        <table:table-column table:style-name="co1" table:default-cell-style-name="ce36"/>
        <table:table-column table:style-name="co1" table:number-columns-repeated="4" table:default-cell-style-name="ce44"/>
        <table:table-column table:style-name="co1" table:default-cell-style-name="Default"/>
        <table:table-column table:style-name="co1" table:default-cell-style-name="ce48"/>
        <table:table-column table:style-name="co1" table:number-columns-repeated="3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Grupo </text:p>
          </table:table-cell>
          <table:table-cell table:style-name="Default" office:value-type="string" calcext:value-type="string">
            <text:p>C112</text:p>
          </table:table-cell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Lunes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string" calcext:value-type="string">
            <text:p>Jueves </text:p>
          </table:table-cell>
          <table:table-cell table:style-name="ce1" office:value-type="string" calcext:value-type="string">
            <text:p>Viernes</text:p>
          </table:table-cell>
          <table:table-cell/>
          <table:table-cell table:style-name="ce1" office:value-type="string" calcext:value-type="string">
            <text:p>Asignaturas</text:p>
          </table:table-cell>
          <table:table-cell office:value-type="string" calcext:value-type="string">
            <text:p>Frec</text:p>
          </table:table-cell>
          <table:table-cell office:value-type="string" calcext:value-type="string">
            <text:p>Faltan</text:p>
          </table:table-cell>
          <table:table-cell office:value-type="string" calcext:value-type="string">
            <text:p>Asignadas</text:p>
          </table:table-cell>
          <table:table-cell/>
          <table:table-cell office:value-type="string" calcext:value-type="string">
            <text:p>Aulas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2">
            <text:p>1er Turno</text:p>
          </table:table-cell>
          <table:table-cell office:value-type="string" calcext:value-type="string">
            <text:p>L-C</text:p>
          </table:table-cell>
          <table:table-cell table:style-name="ce43" office:value-type="string" calcext:value-type="string">
            <text:p>Pro-C</text:p>
          </table:table-cell>
          <table:table-cell table:style-name="ce36" office:value-type="string" calcext:value-type="string">
            <text:p>AM1-CP</text:p>
          </table:table-cell>
          <table:table-cell table:style-name="ce36" office:value-type="string" calcext:value-type="string">
            <text:p>F-CP</text:p>
          </table:table-cell>
          <table:table-cell table:style-name="ce36"/>
          <table:table-cell/>
          <table:table-cell office:value-type="string" calcext:value-type="string">
            <text:p>Pro-C</text:p>
          </table:table-cell>
          <table:table-cell office:value-type="float" office:value="1" calcext:value-type="float">
            <text:p>1</text:p>
          </table:table-cell>
          <table:table-cell table:formula="of:=[.J4]-[.L4]" office:value-type="float" office:value="0" calcext:value-type="float">
            <text:p>0</text:p>
          </table:table-cell>
          <table:table-cell table:formula="of:=COUNTIF([.$C$4:.$G$17];[.I4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1"/>
          <table:table-cell table:style-name="ce26" office:value-type="float" office:value="6" calcext:value-type="float">
            <text:p>6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2" table:style-name="ce26" office:value-type="float" office:value="5" calcext:value-type="float">
            <text:p>5</text:p>
          </table:table-cell>
          <table:table-cell table:style-name="ce26"/>
          <table:table-cell/>
          <table:table-cell office:value-type="string" calcext:value-type="string">
            <text:p>Pro-CP</text:p>
          </table:table-cell>
          <table:table-cell office:value-type="float" office:value="2" calcext:value-type="float">
            <text:p>2</text:p>
          </table:table-cell>
          <table:table-cell table:formula="of:=[.J5]-[.L5]" office:value-type="float" office:value="0" calcext:value-type="float">
            <text:p>0</text:p>
          </table:table-cell>
          <table:table-cell table:formula="of:=COUNTIF([.$C$4:.$G$17];[.I5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2">
            <text:p>2do Turno</text:p>
          </table:table-cell>
          <table:table-cell office:value-type="string" calcext:value-type="string">
            <text:p>AM1-C</text:p>
          </table:table-cell>
          <table:table-cell office:value-type="string" calcext:value-type="string">
            <text:p>F-C</text:p>
          </table:table-cell>
          <table:table-cell office:value-type="string" calcext:value-type="string">
            <text:p>EF</text:p>
          </table:table-cell>
          <table:table-cell table:number-columns-repeated="2" office:value-type="string" calcext:value-type="string">
            <text:p>Pro-CP</text:p>
          </table:table-cell>
          <table:table-cell/>
          <table:table-cell office:value-type="string" calcext:value-type="string">
            <text:p>A1-C</text:p>
          </table:table-cell>
          <table:table-cell office:value-type="float" office:value="2" calcext:value-type="float">
            <text:p>2</text:p>
          </table:table-cell>
          <table:table-cell table:formula="of:=[.J6]-[.L6]" office:value-type="float" office:value="0" calcext:value-type="float">
            <text:p>0</text:p>
          </table:table-cell>
          <table:table-cell table:formula="of:=COUNTIF([.$C$4:.$G$17];[.I6])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1"/>
          <table:table-cell table:style-name="ce26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string" calcext:value-type="string">
            <text:p>SEDER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string" calcext:value-type="string">
            <text:p>Lab</text:p>
          </table:table-cell>
          <table:table-cell/>
          <table:table-cell office:value-type="string" calcext:value-type="string">
            <text:p>A1-CP</text:p>
          </table:table-cell>
          <table:table-cell office:value-type="float" office:value="1" calcext:value-type="float">
            <text:p>1</text:p>
          </table:table-cell>
          <table:table-cell table:formula="of:=[.J7]-[.L7]" office:value-type="float" office:value="0" calcext:value-type="float">
            <text:p>0</text:p>
          </table:table-cell>
          <table:table-cell table:formula="of:=COUNTIF([.$C$4:.$G$17];[.I7])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2">
            <text:p>3er Turno</text:p>
          </table:table-cell>
          <table:table-cell table:number-columns-repeated="2" office:value-type="string" calcext:value-type="string">
            <text:p>A1-C</text:p>
          </table:table-cell>
          <table:table-cell office:value-type="string" calcext:value-type="string">
            <text:p>L-CP</text:p>
          </table:table-cell>
          <table:table-cell office:value-type="string" calcext:value-type="string">
            <text:p>A1-CP</text:p>
          </table:table-cell>
          <table:table-cell table:number-columns-repeated="2"/>
          <table:table-cell office:value-type="string" calcext:value-type="string">
            <text:p>AM1-C</text:p>
          </table:table-cell>
          <table:table-cell office:value-type="float" office:value="1" calcext:value-type="float">
            <text:p>1</text:p>
          </table:table-cell>
          <table:table-cell table:formula="of:=[.J8]-[.L8]" office:value-type="float" office:value="0" calcext:value-type="float">
            <text:p>0</text:p>
          </table:table-cell>
          <table:table-cell table:formula="of:=COUNTIF([.$C$4:.$G$17];[.I8])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covered-table-cell table:style-name="ce1"/>
          <table:table-cell table:style-name="ce26" office:value-type="float" office:value="8" calcext:value-type="float">
            <text:p>8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/>
          <table:table-cell office:value-type="string" calcext:value-type="string">
            <text:p>AM1-CP</text:p>
          </table:table-cell>
          <table:table-cell office:value-type="float" office:value="1" calcext:value-type="float">
            <text:p>1</text:p>
          </table:table-cell>
          <table:table-cell table:formula="of:=[.J9]-[.L9]" office:value-type="float" office:value="0" calcext:value-type="float">
            <text:p>0</text:p>
          </table:table-cell>
          <table:table-cell table:formula="of:=COUNTIF([.$C$4:.$G$17];[.I9])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number-columns-spanned="1" table:number-rows-spanned="2"/>
          <table:table-cell table:style-name="ce41"/>
          <table:table-cell table:style-name="ce46" table:number-columns-repeated="4"/>
          <table:table-cell/>
          <table:table-cell office:value-type="string" calcext:value-type="string">
            <text:p>L-C</text:p>
          </table:table-cell>
          <table:table-cell office:value-type="float" office:value="1" calcext:value-type="float">
            <text:p>1</text:p>
          </table:table-cell>
          <table:table-cell table:formula="of:=[.J10]-[.L10]" office:value-type="float" office:value="0" calcext:value-type="float">
            <text:p>0</text:p>
          </table:table-cell>
          <table:table-cell table:formula="of:=COUNTIF([.$C$4:.$G$17];[.I10])"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covered-table-cell table:style-name="ce1"/>
          <table:table-cell table:style-name="ce42"/>
          <table:table-cell table:style-name="ce47" table:number-columns-repeated="4"/>
          <table:table-cell/>
          <table:table-cell office:value-type="string" calcext:value-type="string">
            <text:p>L-CP</text:p>
          </table:table-cell>
          <table:table-cell office:value-type="float" office:value="1" calcext:value-type="float">
            <text:p>1</text:p>
          </table:table-cell>
          <table:table-cell table:formula="of:=[.J11]-[.L11]" office:value-type="float" office:value="0" calcext:value-type="float">
            <text:p>0</text:p>
          </table:table-cell>
          <table:table-cell table:formula="of:=COUNTIF([.$C$4:.$G$17];[.I11])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2">
            <text:p>4to Turno</text:p>
          </table:table-cell>
          <table:table-cell table:number-columns-repeated="6"/>
          <table:table-cell office:value-type="string" calcext:value-type="string">
            <text:p>F-C</text:p>
          </table:table-cell>
          <table:table-cell office:value-type="float" office:value="1" calcext:value-type="float">
            <text:p>1</text:p>
          </table:table-cell>
          <table:table-cell table:formula="of:=[.J12]-[.L12]" office:value-type="float" office:value="0" calcext:value-type="float">
            <text:p>0</text:p>
          </table:table-cell>
          <table:table-cell table:formula="of:=COUNTIF([.$C$4:.$G$17];[.I12])"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covered-table-cell table:style-name="ce1"/>
          <table:table-cell table:style-name="ce26"/>
          <table:table-cell table:style-name="ce32" table:number-columns-repeated="4"/>
          <table:table-cell/>
          <table:table-cell office:value-type="string" calcext:value-type="string">
            <text:p>F-CP</text:p>
          </table:table-cell>
          <table:table-cell office:value-type="float" office:value="1" calcext:value-type="float">
            <text:p>1</text:p>
          </table:table-cell>
          <table:table-cell table:formula="of:=[.J13]-[.L13]" office:value-type="float" office:value="0" calcext:value-type="float">
            <text:p>0</text:p>
          </table:table-cell>
          <table:table-cell table:formula="of:=COUNTIF([.$C$4:.$G$17];[.I13])" office:value-type="float" office:value="1" calcext:value-type="float">
            <text:p>1</text:p>
          </table:table-cell>
          <table:table-cell/>
          <table:table-cell office:value-type="string" calcext:value-type="string">
            <text:p>Lab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2">
            <text:p>5to Turno</text:p>
          </table:table-cell>
          <table:table-cell table:number-columns-repeated="6"/>
          <table:table-cell office:value-type="string" calcext:value-type="string">
            <text:p>EF</text:p>
          </table:table-cell>
          <table:table-cell office:value-type="float" office:value="1" calcext:value-type="float">
            <text:p>1</text:p>
          </table:table-cell>
          <table:table-cell table:formula="of:=[.J14]-[.L14]" office:value-type="float" office:value="0" calcext:value-type="float">
            <text:p>0</text:p>
          </table:table-cell>
          <table:table-cell table:formula="of:=COUNTIF([.$C$4:.$G$17];[.I14])" office:value-type="float" office:value="1" calcext:value-type="float">
            <text:p>1</text:p>
          </table:table-cell>
          <table:table-cell/>
          <table:table-cell table:style-name="Default"/>
        </table:table-row>
        <table:table-row table:style-name="ro1">
          <table:table-cell/>
          <table:covered-table-cell table:style-name="ce1"/>
          <table:table-cell table:style-name="ce26"/>
          <table:table-cell table:style-name="ce32" table:number-columns-repeated="4"/>
          <table:table-cell/>
          <table:table-cell table:style-name="ce1"/>
          <table:table-cell table:number-columns-repeated="4"/>
          <table:table-cell table:style-name="Default"/>
        </table:table-row>
        <table:table-row table:style-name="ro1">
          <table:table-cell/>
          <table:table-cell office:value-type="string" calcext:value-type="string" table:number-columns-spanned="1" table:number-rows-spanned="2">
            <text:p>6to Turno</text:p>
          </table:table-cell>
          <table:table-cell table:number-columns-repeated="6"/>
          <table:table-cell table:style-name="Default" table:number-columns-repeated="4"/>
          <table:table-cell/>
          <table:table-cell table:style-name="Default"/>
        </table:table-row>
        <table:table-row table:style-name="ro1">
          <table:table-cell/>
          <table:covered-table-cell table:style-name="Default"/>
          <table:table-cell table:style-name="ce26"/>
          <table:table-cell table:style-name="ce32" table:number-columns-repeated="4"/>
          <table:table-cell/>
          <table:table-cell table:style-name="ce38" office:value-type="string" calcext:value-type="string">
            <text:p>Resaltar</text:p>
          </table:table-cell>
          <table:table-cell table:content-validation-name="val3"/>
          <table:table-cell table:style-name="Default" table:number-columns-repeated="2"/>
          <table:table-cell/>
          <table:table-cell table:style-name="Default"/>
        </table:table-row>
        <calcext:conditional-formats>
          <calcext:conditional-format calcext:target-range-address="C112.I4:C112.I14">
            <calcext:condition calcext:apply-style-name="Good" calcext:value="formula-is([.K4]=0)" calcext:base-cell-address="C112.I4"/>
            <calcext:condition calcext:apply-style-name="Error" calcext:value="formula-is([.K4]&lt;0)" calcext:base-cell-address="C112.I4"/>
          </calcext:conditional-format>
          <calcext:conditional-format calcext:target-range-address="C112.C4:C112.G17">
            <calcext:condition calcext:apply-style-name="Background" calcext:value="formula-is(AND([.C4]&lt;&gt;&quot;&quot;; [.C4]=[.$J$17]))" calcext:base-cell-address="C112.C4"/>
          </calcext:conditional-format>
          <calcext:conditional-format calcext:target-range-address="C112.C4:C112.G4 C112.C6:C112.G6 C112.C8:C112.G8 C112.C12:C112.G12 C112.C14:C112.G14 C112.C16:C112.G16">
            <calcext:condition calcext:apply-style-name="Card" calcext:value="formula-is(AND([.C4]&lt;&gt;&quot;&quot;; COUNTIF([.$I$4:.$I$14];[.C4])=0))" calcext:base-cell-address="C112.C4"/>
          </calcext:conditional-format>
          <calcext:conditional-format calcext:target-range-address="C112.C5:C112.G5 C112.C7:C112.G7 C112.C9:C112.G9 C112.C13:C112.G13 C112.C15:C112.G15 C112.C17:C112.G17">
            <calcext:condition calcext:apply-style-name="Note" calcext:value="formula-is(AND([.C5]&lt;&gt;&quot;&quot;; COUNTIF([.$N$4:.$N$13];[.C5])=0))" calcext:base-cell-address="C112.C5"/>
          </calcext:conditional-format>
        </calcext:conditional-formats>
      </table:table>
      <table:table table:name="C113" table:style-name="ta1">
        <table:table-column table:style-name="co1" table:number-columns-repeated="8" table:default-cell-style-name="Default"/>
        <table:table-column table:style-name="co1" table:default-cell-style-name="ce65"/>
        <table:table-column table:style-name="co1" table:number-columns-repeated="3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rupo </text:p>
          </table:table-cell>
          <table:table-cell office:value-type="string" calcext:value-type="string">
            <text:p>C113</text:p>
          </table:table-cell>
          <table:table-cell table:number-columns-repeated="6"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Lunes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string" calcext:value-type="string">
            <text:p>Jueves </text:p>
          </table:table-cell>
          <table:table-cell table:style-name="ce1" office:value-type="string" calcext:value-type="string">
            <text:p>Viernes</text:p>
          </table:table-cell>
          <table:table-cell/>
          <table:table-cell table:style-name="ce1" office:value-type="string" calcext:value-type="string">
            <text:p>Asignaturas</text:p>
          </table:table-cell>
          <table:table-cell office:value-type="string" calcext:value-type="string">
            <text:p>Frec</text:p>
          </table:table-cell>
          <table:table-cell office:value-type="string" calcext:value-type="string">
            <text:p>Faltan</text:p>
          </table:table-cell>
          <table:table-cell office:value-type="string" calcext:value-type="string">
            <text:p>Asignadas</text:p>
          </table:table-cell>
          <table:table-cell/>
          <table:table-cell table:style-name="ce1" office:value-type="string" calcext:value-type="string">
            <text:p>Aulas</text:p>
          </table:table-cell>
        </table:table-row>
        <table:table-row table:style-name="ro1">
          <table:table-cell/>
          <table:table-cell table:style-name="ce39" office:value-type="string" calcext:value-type="string" table:number-columns-spanned="1" table:number-rows-spanned="2">
            <text:p>1er Turno</text:p>
          </table:table-cell>
          <table:table-cell table:style-name="ce49" office:value-type="string" calcext:value-type="string">
            <text:p>L-C</text:p>
          </table:table-cell>
          <table:table-cell table:style-name="ce53" office:value-type="string" calcext:value-type="string">
            <text:p>Pro-C</text:p>
          </table:table-cell>
          <table:table-cell table:style-name="ce49" office:value-type="string" calcext:value-type="string">
            <text:p>AM1-CP</text:p>
          </table:table-cell>
          <table:table-cell table:style-name="ce49" office:value-type="string" calcext:value-type="string">
            <text:p>F-CP</text:p>
          </table:table-cell>
          <table:table-cell table:style-name="ce49"/>
          <table:table-cell/>
          <table:table-cell office:value-type="string" calcext:value-type="string">
            <text:p>Pro-C</text:p>
          </table:table-cell>
          <table:table-cell office:value-type="float" office:value="1" calcext:value-type="float">
            <text:p>1</text:p>
          </table:table-cell>
          <table:table-cell table:formula="of:=[.J4]-[.L4]" office:value-type="float" office:value="0" calcext:value-type="float">
            <text:p>0</text:p>
          </table:table-cell>
          <table:table-cell table:formula="of:=COUNTIF([.$C$4:.$G$17];[.I4])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1"/>
          <table:table-cell table:style-name="ce50" office:value-type="string" calcext:value-type="string">
            <text:p>Lab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1" calcext:value-type="float">
            <text:p>1</text:p>
          </table:table-cell>
          <table:table-cell table:style-name="ce50"/>
          <table:table-cell/>
          <table:table-cell office:value-type="string" calcext:value-type="string">
            <text:p>Pro-CP</text:p>
          </table:table-cell>
          <table:table-cell office:value-type="float" office:value="2" calcext:value-type="float">
            <text:p>2</text:p>
          </table:table-cell>
          <table:table-cell table:formula="of:=[.J5]-[.L5]" office:value-type="float" office:value="0" calcext:value-type="float">
            <text:p>0</text:p>
          </table:table-cell>
          <table:table-cell table:formula="of:=COUNTIF([.$C$4:.$G$17];[.I5])" office:value-type="float" office:value="2" calcext:value-type="float">
            <text:p>2</text:p>
          </table:table-cell>
          <table:table-cell/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9" office:value-type="string" calcext:value-type="string" table:number-columns-spanned="1" table:number-rows-spanned="2">
            <text:p>2do Turno</text:p>
          </table:table-cell>
          <table:table-cell table:style-name="ce49" office:value-type="string" calcext:value-type="string">
            <text:p>AM1-C</text:p>
          </table:table-cell>
          <table:table-cell table:style-name="ce54" office:value-type="string" calcext:value-type="string">
            <text:p>F-C</text:p>
          </table:table-cell>
          <table:table-cell table:style-name="ce54" office:value-type="string" calcext:value-type="string">
            <text:p>EF</text:p>
          </table:table-cell>
          <table:table-cell table:style-name="ce54" office:value-type="string" calcext:value-type="string">
            <text:p>Pro-CP</text:p>
          </table:table-cell>
          <table:table-cell table:style-name="ce59"/>
          <table:table-cell/>
          <table:table-cell office:value-type="string" calcext:value-type="string">
            <text:p>A1-C</text:p>
          </table:table-cell>
          <table:table-cell office:value-type="float" office:value="2" calcext:value-type="float">
            <text:p>2</text:p>
          </table:table-cell>
          <table:table-cell table:formula="of:=[.J6]-[.L6]" office:value-type="float" office:value="0" calcext:value-type="float">
            <text:p>0</text:p>
          </table:table-cell>
          <table:table-cell table:formula="of:=COUNTIF([.$C$4:.$G$17];[.I6])" office:value-type="float" office:value="2" calcext:value-type="float">
            <text:p>2</text:p>
          </table:table-cell>
          <table:table-cell/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1"/>
          <table:table-cell table:style-name="ce50" office:value-type="float" office:value="6" calcext:value-type="float">
            <text:p>6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string" calcext:value-type="string">
            <text:p>SEDER</text:p>
          </table:table-cell>
          <table:table-cell table:style-name="ce55" office:value-type="float" office:value="1" calcext:value-type="float">
            <text:p>1</text:p>
          </table:table-cell>
          <table:table-cell table:style-name="ce3"/>
          <table:table-cell/>
          <table:table-cell office:value-type="string" calcext:value-type="string">
            <text:p>A1-CP</text:p>
          </table:table-cell>
          <table:table-cell office:value-type="float" office:value="1" calcext:value-type="float">
            <text:p>1</text:p>
          </table:table-cell>
          <table:table-cell table:formula="of:=[.J7]-[.L7]" office:value-type="float" office:value="0" calcext:value-type="float">
            <text:p>0</text:p>
          </table:table-cell>
          <table:table-cell table:formula="of:=COUNTIF([.$C$4:.$G$17];[.I7])" office:value-type="float" office:value="1" calcext:value-type="float">
            <text:p>1</text:p>
          </table:table-cell>
          <table:table-cell/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9" office:value-type="string" calcext:value-type="string" table:number-columns-spanned="1" table:number-rows-spanned="2">
            <text:p>3er Turno</text:p>
          </table:table-cell>
          <table:table-cell table:style-name="ce49" office:value-type="string" calcext:value-type="string">
            <text:p>A1-C</text:p>
          </table:table-cell>
          <table:table-cell table:style-name="ce54" office:value-type="string" calcext:value-type="string">
            <text:p>A1-C</text:p>
          </table:table-cell>
          <table:table-cell table:style-name="ce54" office:value-type="string" calcext:value-type="string">
            <text:p>L-CP</text:p>
          </table:table-cell>
          <table:table-cell table:style-name="ce54" office:value-type="string" calcext:value-type="string">
            <text:p>A1-CP</text:p>
          </table:table-cell>
          <table:table-cell table:style-name="ce61" office:value-type="string" calcext:value-type="string">
            <text:p>Pro-CP</text:p>
          </table:table-cell>
          <table:table-cell/>
          <table:table-cell office:value-type="string" calcext:value-type="string">
            <text:p>AM1-C</text:p>
          </table:table-cell>
          <table:table-cell office:value-type="float" office:value="1" calcext:value-type="float">
            <text:p>1</text:p>
          </table:table-cell>
          <table:table-cell table:formula="of:=[.J8]-[.L8]" office:value-type="float" office:value="0" calcext:value-type="float">
            <text:p>0</text:p>
          </table:table-cell>
          <table:table-cell table:formula="of:=COUNTIF([.$C$4:.$G$17];[.I8])" office:value-type="float" office:value="1" calcext:value-type="float">
            <text:p>1</text:p>
          </table:table-cell>
          <table:table-cell/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/>
          <table:covered-table-cell table:style-name="ce1"/>
          <table:table-cell table:style-name="ce50" office:value-type="float" office:value="6" calcext:value-type="float">
            <text:p>6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Lab</text:p>
          </table:table-cell>
          <table:table-cell/>
          <table:table-cell office:value-type="string" calcext:value-type="string">
            <text:p>AM1-CP</text:p>
          </table:table-cell>
          <table:table-cell office:value-type="float" office:value="1" calcext:value-type="float">
            <text:p>1</text:p>
          </table:table-cell>
          <table:table-cell table:formula="of:=[.J9]-[.L9]" office:value-type="float" office:value="0" calcext:value-type="float">
            <text:p>0</text:p>
          </table:table-cell>
          <table:table-cell table:formula="of:=COUNTIF([.$C$4:.$G$17];[.I9])" office:value-type="float" office:value="1" calcext:value-type="float">
            <text:p>1</text:p>
          </table:table-cell>
          <table:table-cell/>
          <table:table-cell table:style-name="ce1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39" table:number-columns-spanned="1" table:number-rows-spanned="2"/>
          <table:table-cell table:style-name="ce51"/>
          <table:table-cell table:style-name="ce56" table:number-columns-repeated="4"/>
          <table:table-cell/>
          <table:table-cell office:value-type="string" calcext:value-type="string">
            <text:p>L-C</text:p>
          </table:table-cell>
          <table:table-cell office:value-type="float" office:value="1" calcext:value-type="float">
            <text:p>1</text:p>
          </table:table-cell>
          <table:table-cell table:formula="of:=[.J10]-[.L10]" office:value-type="float" office:value="0" calcext:value-type="float">
            <text:p>0</text:p>
          </table:table-cell>
          <table:table-cell table:formula="of:=COUNTIF([.$C$4:.$G$17];[.I10])" office:value-type="float" office:value="1" calcext:value-type="float">
            <text:p>1</text:p>
          </table:table-cell>
          <table:table-cell/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/>
          <table:covered-table-cell table:style-name="ce1"/>
          <table:table-cell table:style-name="ce52"/>
          <table:table-cell table:style-name="ce57" table:number-columns-repeated="4"/>
          <table:table-cell/>
          <table:table-cell office:value-type="string" calcext:value-type="string">
            <text:p>L-CP</text:p>
          </table:table-cell>
          <table:table-cell office:value-type="float" office:value="1" calcext:value-type="float">
            <text:p>1</text:p>
          </table:table-cell>
          <table:table-cell table:formula="of:=[.J11]-[.L11]" office:value-type="float" office:value="0" calcext:value-type="float">
            <text:p>0</text:p>
          </table:table-cell>
          <table:table-cell table:formula="of:=COUNTIF([.$C$4:.$G$17];[.I11])" office:value-type="float" office:value="1" calcext:value-type="float">
            <text:p>1</text:p>
          </table:table-cell>
          <table:table-cell/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39" office:value-type="string" calcext:value-type="string" table:number-columns-spanned="1" table:number-rows-spanned="2">
            <text:p>4to Turno</text:p>
          </table:table-cell>
          <table:table-cell table:style-name="ce49"/>
          <table:table-cell table:style-name="ce54" table:number-columns-repeated="4"/>
          <table:table-cell/>
          <table:table-cell office:value-type="string" calcext:value-type="string">
            <text:p>F-C</text:p>
          </table:table-cell>
          <table:table-cell office:value-type="float" office:value="1" calcext:value-type="float">
            <text:p>1</text:p>
          </table:table-cell>
          <table:table-cell table:formula="of:=[.J12]-[.L12]" office:value-type="float" office:value="0" calcext:value-type="float">
            <text:p>0</text:p>
          </table:table-cell>
          <table:table-cell table:formula="of:=COUNTIF([.$C$4:.$G$17];[.I12])" office:value-type="float" office:value="1" calcext:value-type="float">
            <text:p>1</text:p>
          </table:table-cell>
          <table:table-cell/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/>
          <table:covered-table-cell table:style-name="ce1"/>
          <table:table-cell table:style-name="ce50"/>
          <table:table-cell table:style-name="ce55" table:number-columns-repeated="4"/>
          <table:table-cell/>
          <table:table-cell office:value-type="string" calcext:value-type="string">
            <text:p>F-CP</text:p>
          </table:table-cell>
          <table:table-cell office:value-type="float" office:value="1" calcext:value-type="float">
            <text:p>1</text:p>
          </table:table-cell>
          <table:table-cell table:formula="of:=[.J13]-[.L13]" office:value-type="float" office:value="0" calcext:value-type="float">
            <text:p>0</text:p>
          </table:table-cell>
          <table:table-cell table:formula="of:=COUNTIF([.$C$4:.$G$17];[.I13])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Lab</text:p>
          </table:table-cell>
        </table:table-row>
        <table:table-row table:style-name="ro1">
          <table:table-cell/>
          <table:table-cell table:style-name="ce39" office:value-type="string" calcext:value-type="string" table:number-columns-spanned="1" table:number-rows-spanned="2">
            <text:p>5to Turno</text:p>
          </table:table-cell>
          <table:table-cell table:style-name="ce49"/>
          <table:table-cell table:style-name="ce54" table:number-columns-repeated="4"/>
          <table:table-cell/>
          <table:table-cell office:value-type="string" calcext:value-type="string">
            <text:p>EF</text:p>
          </table:table-cell>
          <table:table-cell office:value-type="float" office:value="1" calcext:value-type="float">
            <text:p>1</text:p>
          </table:table-cell>
          <table:table-cell table:formula="of:=[.J14]-[.L14]" office:value-type="float" office:value="0" calcext:value-type="float">
            <text:p>0</text:p>
          </table:table-cell>
          <table:table-cell table:formula="of:=COUNTIF([.$C$4:.$G$17];[.I1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covered-table-cell table:style-name="ce1"/>
          <table:table-cell table:style-name="ce50"/>
          <table:table-cell table:style-name="ce55" table:number-columns-repeated="4"/>
          <table:table-cell/>
          <table:table-cell table:style-name="ce1"/>
          <table:table-cell table:number-columns-repeated="5"/>
        </table:table-row>
        <table:table-row table:style-name="ro1">
          <table:table-cell/>
          <table:table-cell table:style-name="ce39" office:value-type="string" calcext:value-type="string" table:number-columns-spanned="1" table:number-rows-spanned="2">
            <text:p>6to Turno</text:p>
          </table:table-cell>
          <table:table-cell table:style-name="ce49"/>
          <table:table-cell table:style-name="ce54" table:number-columns-repeated="4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covered-table-cell/>
          <table:table-cell table:style-name="ce50"/>
          <table:table-cell table:style-name="ce55" table:number-columns-repeated="4"/>
          <table:table-cell/>
          <table:table-cell table:style-name="ce38" office:value-type="string" calcext:value-type="string">
            <text:p>Resaltar</text:p>
          </table:table-cell>
          <table:table-cell table:content-validation-name="val3"/>
          <table:table-cell table:style-name="Default" table:number-columns-repeated="2"/>
          <table:table-cell table:number-columns-repeated="2"/>
        </table:table-row>
        <table:table-row table:style-name="ro1" table:number-rows-repeated="4">
          <table:table-cell table:number-columns-repeated="8"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8"/>
          <table:table-cell table:style-name="ce63" table:content-validation-name="val4"/>
          <table:table-cell table:style-name="Default" table:number-columns-repeated="3"/>
          <table:table-cell table:number-columns-repeated="2"/>
        </table:table-row>
        <calcext:conditional-formats>
          <calcext:conditional-format calcext:target-range-address="C113.I4:C113.I14">
            <calcext:condition calcext:apply-style-name="Good" calcext:value="formula-is([.K4]=0)" calcext:base-cell-address="C113.I4"/>
            <calcext:condition calcext:apply-style-name="Error" calcext:value="formula-is([.K4]&lt;0)" calcext:base-cell-address="C113.I4"/>
          </calcext:conditional-format>
          <calcext:conditional-format calcext:target-range-address="C113.C4:C113.F17 C113.G4:C113.G5 C113.G8:C113.G17">
            <calcext:condition calcext:apply-style-name="Background" calcext:value="formula-is(AND([.C4]&lt;&gt;&quot;&quot;; [.C4]=[.$J$17]))" calcext:base-cell-address="C113.C4"/>
          </calcext:conditional-format>
          <calcext:conditional-format calcext:target-range-address="C113.C4:C113.G4 C113.C6:C113.F6 C113.C8:C113.G8 C113.C12:C113.G12 C113.C14:C113.G14 C113.C16:C113.G16">
            <calcext:condition calcext:apply-style-name="Card" calcext:value="formula-is(AND([.C4]&lt;&gt;&quot;&quot;; COUNTIF([.$I$4:.$I$14];[.C4])=0))" calcext:base-cell-address="C113.C4"/>
          </calcext:conditional-format>
          <calcext:conditional-format calcext:target-range-address="C113.C5:C113.G5 C113.C7:C113.F7 C113.C9:C113.G9 C113.C13:C113.G13 C113.C15:C113.G15 C113.C17:C113.G17">
            <calcext:condition calcext:apply-style-name="Error" calcext:value="formula-is(AND([.C4]&lt;&gt;&quot;&quot;; [.C5]=&quot;&quot;))" calcext:base-cell-address="C113.C5"/>
            <calcext:condition calcext:apply-style-name="Note" calcext:value="formula-is(AND([.C5]&lt;&gt;&quot;&quot;; COUNTIF([.$N$4:.$N$13];[.C5])=0))" calcext:base-cell-address="C113.C5"/>
          </calcext:conditional-format>
        </calcext:conditional-formats>
      </table:table>
      <table:table table:name="Aulas" table:style-name="ta1">
        <table:table-column table:style-name="co1" table:default-cell-style-name="Default"/>
        <table:table-column table:style-name="co1" table:number-columns-repeated="11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11"/>
          <table:table-cell/>
          <table:table-cell table:style-name="ce2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Lab</text:p>
          </table:table-cell>
          <table:table-cell/>
          <table:table-cell table:style-name="ce2"/>
        </table:table-row>
        <table:table-row table:style-name="ro1">
          <table:table-cell/>
          <table:table-cell table:style-name="ce64" office:value-type="string" calcext:value-type="string">
            <text:p>Lunes</text:p>
          </table:table-cell>
          <table:table-cell table:style-name="ce64" office:value-type="string" calcext:value-type="string">
            <text:p>Aula 1</text:p>
          </table:table-cell>
          <table:table-cell table:style-name="ce64" office:value-type="string" calcext:value-type="string">
            <text:p>Aula 2</text:p>
          </table:table-cell>
          <table:table-cell table:style-name="ce64" office:value-type="string" calcext:value-type="string">
            <text:p>Aula 3</text:p>
          </table:table-cell>
          <table:table-cell table:style-name="ce64" office:value-type="string" calcext:value-type="string">
            <text:p>Aula 4</text:p>
          </table:table-cell>
          <table:table-cell table:style-name="ce64" office:value-type="string" calcext:value-type="string">
            <text:p>Aula 5</text:p>
          </table:table-cell>
          <table:table-cell table:style-name="ce64" office:value-type="string" calcext:value-type="string">
            <text:p>Aula 6</text:p>
          </table:table-cell>
          <table:table-cell table:style-name="ce64" office:value-type="string" calcext:value-type="string">
            <text:p>Aula 7</text:p>
          </table:table-cell>
          <table:table-cell table:style-name="ce64" office:value-type="string" calcext:value-type="string">
            <text:p>Aula 8</text:p>
          </table:table-cell>
          <table:table-cell table:style-name="ce64" office:value-type="string" calcext:value-type="string">
            <text:p>Aula 9</text:p>
          </table:table-cell>
          <table:table-cell table:style-name="ce64" office:value-type="string" calcext:value-type="string">
            <text:p>Lab</text:p>
          </table:table-cell>
          <table:table-cell/>
          <table:table-cell table:style-name="ce2"/>
        </table:table-row>
        <table:table-row table:style-name="ro1">
          <table:table-cell/>
          <table:table-cell office:value-type="string" calcext:value-type="string">
            <text:p>1ro</text:p>
          </table:table-cell>
          <table:table-cell table:style-name="ce69" table:formula="of:=SUBSTITUTE(TRIM(COM.MICROSOFT.CONCAT(IF([$C111.$C$5]=[.C$2];[$C111.$B$1] &amp; &quot; &quot;; &quot;&quot;); IF([$C112.$C$5]=[.C$2];[$C112.$B$1] &amp; &quot; &quot;; &quot;&quot;); IF([$C113.$C$5]=[.C$2];[$C113.$B$1] &amp; &quot; &quot;; &quot;&quot;))); &quot; &quot;; &quot;,&quot;)">
            <text:p/>
          </table:table-cell>
          <table:table-cell table:style-name="ce69" table:formula="of:=SUBSTITUTE(TRIM(COM.MICROSOFT.CONCAT(IF([$C111.$C$5]=[.D$2];[$C111.$B$1] &amp; &quot; &quot;; &quot;&quot;); IF([$C112.$C$5]=[.D$2];[$C112.$B$1] &amp; &quot; &quot;; &quot;&quot;); IF([$C113.$C$5]=[.D$2];[$C113.$B$1] &amp; &quot; &quot;; &quot;&quot;))); &quot; &quot;; &quot;,&quot;)">
            <text:p/>
          </table:table-cell>
          <table:table-cell table:style-name="ce69" table:formula="of:=SUBSTITUTE(TRIM(COM.MICROSOFT.CONCAT(IF([$C111.$C$5]=[.E$2];[$C111.$B$1] &amp; &quot; &quot;; &quot;&quot;); IF([$C112.$C$5]=[.E$2];[$C112.$B$1] &amp; &quot; &quot;; &quot;&quot;); IF([$C113.$C$5]=[.E$2];[$C113.$B$1] &amp; &quot; &quot;; &quot;&quot;))); &quot; &quot;; &quot;,&quot;)">
            <text:p/>
          </table:table-cell>
          <table:table-cell table:style-name="ce69" table:formula="of:=SUBSTITUTE(TRIM(COM.MICROSOFT.CONCAT(IF([$C111.$C$5]=[.F$2];[$C111.$B$1] &amp; &quot; &quot;; &quot;&quot;); IF([$C112.$C$5]=[.F$2];[$C112.$B$1] &amp; &quot; &quot;; &quot;&quot;); IF([$C113.$C$5]=[.F$2];[$C113.$B$1] &amp; &quot; &quot;; &quot;&quot;))); &quot; &quot;; &quot;,&quot;)">
            <text:p/>
          </table:table-cell>
          <table:table-cell table:style-name="ce69" table:formula="of:=SUBSTITUTE(TRIM(COM.MICROSOFT.CONCAT(IF([$C111.$C$5]=[.G$2];[$C111.$B$1] &amp; &quot; &quot;; &quot;&quot;); IF([$C112.$C$5]=[.G$2];[$C112.$B$1] &amp; &quot; &quot;; &quot;&quot;); IF([$C113.$C$5]=[.G$2];[$C113.$B$1] &amp; &quot; &quot;; &quot;&quot;))); &quot; &quot;; &quot;,&quot;)">
            <text:p/>
          </table:table-cell>
          <table:table-cell table:style-name="ce69" table:formula="of:=SUBSTITUTE(TRIM(COM.MICROSOFT.CONCAT(IF([$C111.$C$5]=[.H$2];[$C111.$B$1] &amp; &quot; &quot;; &quot;&quot;); IF([$C112.$C$5]=[.H$2];[$C112.$B$1] &amp; &quot; &quot;; &quot;&quot;); IF([$C113.$C$5]=[.H$2];[$C113.$B$1] &amp; &quot; &quot;; &quot;&quot;))); &quot; &quot;; &quot;,&quot;)" office:value-type="string" office:string-value="C111,C112" calcext:value-type="string">
            <text:p>C111,C112</text:p>
          </table:table-cell>
          <table:table-cell table:style-name="ce69" table:formula="of:=SUBSTITUTE(TRIM(COM.MICROSOFT.CONCAT(IF([$C111.$C$5]=[.I$2];[$C111.$B$1] &amp; &quot; &quot;; &quot;&quot;); IF([$C112.$C$5]=[.I$2];[$C112.$B$1] &amp; &quot; &quot;; &quot;&quot;); IF([$C113.$C$5]=[.I$2];[$C113.$B$1] &amp; &quot; &quot;; &quot;&quot;))); &quot; &quot;; &quot;,&quot;)">
            <text:p/>
          </table:table-cell>
          <table:table-cell table:style-name="ce69" table:formula="of:=SUBSTITUTE(TRIM(COM.MICROSOFT.CONCAT(IF([$C111.$C$5]=[.J$2];[$C111.$B$1] &amp; &quot; &quot;; &quot;&quot;); IF([$C112.$C$5]=[.J$2];[$C112.$B$1] &amp; &quot; &quot;; &quot;&quot;); IF([$C113.$C$5]=[.J$2];[$C113.$B$1] &amp; &quot; &quot;; &quot;&quot;))); &quot; &quot;; &quot;,&quot;)">
            <text:p/>
          </table:table-cell>
          <table:table-cell table:style-name="ce69" table:formula="of:=SUBSTITUTE(TRIM(COM.MICROSOFT.CONCAT(IF([$C111.$C$5]=[.K$2];[$C111.$B$1] &amp; &quot; &quot;; &quot;&quot;); IF([$C112.$C$5]=[.K$2];[$C112.$B$1] &amp; &quot; &quot;; &quot;&quot;); IF([$C113.$C$5]=[.K$2];[$C113.$B$1] &amp; &quot; &quot;; &quot;&quot;))); &quot; &quot;; &quot;,&quot;)">
            <text:p/>
          </table:table-cell>
          <table:table-cell table:style-name="ce69" table:formula="of:=SUBSTITUTE(TRIM(COM.MICROSOFT.CONCAT(IF([$C111.$C$5]=[.L$2];[$C111.$B$1] &amp; &quot; &quot;; &quot;&quot;); IF([$C112.$C$5]=[.L$2];[$C112.$B$1] &amp; &quot; &quot;; &quot;&quot;); IF([$C113.$C$5]=[.L$2];[$C113.$B$1] &amp; &quot; &quot;; &quot;&quot;))); &quot; &quot;; &quot;,&quot;)" office:value-type="string" office:string-value="C113" calcext:value-type="string">
            <text:p>C113</text:p>
          </table:table-cell>
          <table:table-cell/>
          <table:table-cell table:style-name="ce2"/>
        </table:table-row>
        <table:table-row table:style-name="ro1">
          <table:table-cell/>
          <table:table-cell office:value-type="string" calcext:value-type="string">
            <text:p>2do</text:p>
          </table:table-cell>
          <table:table-cell table:style-name="ce69" table:formula="of:=SUBSTITUTE(TRIM(COM.MICROSOFT.CONCAT(IF([$C111.$C$9]=[.C$2];[$C111.$B$1] &amp; &quot; &quot;; &quot;&quot;); IF([$C112.$C$9]=[.C$2];[$C112.$B$1] &amp; &quot; &quot;; &quot;&quot;); IF([$C113.$C$9]=[.C$2];[$C113.$B$1] &amp; &quot; &quot;; &quot;&quot;))); &quot; &quot;; &quot;,&quot;)">
            <text:p/>
          </table:table-cell>
          <table:table-cell table:style-name="ce69" table:formula="of:=SUBSTITUTE(TRIM(COM.MICROSOFT.CONCAT(IF([$C111.$C$7]=[.D$2];[$C111.$B$1] &amp; &quot; &quot;; &quot;&quot;); IF([$C112.$C$7]=[.D$2];[$C112.$B$1] &amp; &quot; &quot;; &quot;&quot;); IF([$C113.$C$7]=[.D$2];[$C113.$B$1] &amp; &quot; &quot;; &quot;&quot;))); &quot; &quot;; &quot;,&quot;)">
            <text:p/>
          </table:table-cell>
          <table:table-cell table:style-name="ce69" table:formula="of:=SUBSTITUTE(TRIM(COM.MICROSOFT.CONCAT(IF([$C111.$C$7]=[.E$2];[$C111.$B$1] &amp; &quot; &quot;; &quot;&quot;); IF([$C112.$C$7]=[.E$2];[$C112.$B$1] &amp; &quot; &quot;; &quot;&quot;); IF([$C113.$C$7]=[.E$2];[$C113.$B$1] &amp; &quot; &quot;; &quot;&quot;))); &quot; &quot;; &quot;,&quot;)">
            <text:p/>
          </table:table-cell>
          <table:table-cell table:style-name="ce69" table:formula="of:=SUBSTITUTE(TRIM(COM.MICROSOFT.CONCAT(IF([$C111.$C$7]=[.F$2];[$C111.$B$1] &amp; &quot; &quot;; &quot;&quot;); IF([$C112.$C$7]=[.F$2];[$C112.$B$1] &amp; &quot; &quot;; &quot;&quot;); IF([$C113.$C$7]=[.F$2];[$C113.$B$1] &amp; &quot; &quot;; &quot;&quot;))); &quot; &quot;; &quot;,&quot;)">
            <text:p/>
          </table:table-cell>
          <table:table-cell table:style-name="ce69" table:formula="of:=SUBSTITUTE(TRIM(COM.MICROSOFT.CONCAT(IF([$C111.$C$7]=[.G$2];[$C111.$B$1] &amp; &quot; &quot;; &quot;&quot;); IF([$C112.$C$7]=[.G$2];[$C112.$B$1] &amp; &quot; &quot;; &quot;&quot;); IF([$C113.$C$7]=[.G$2];[$C113.$B$1] &amp; &quot; &quot;; &quot;&quot;))); &quot; &quot;; &quot;,&quot;)" office:value-type="string" office:string-value="C112" calcext:value-type="string">
            <text:p>C112</text:p>
          </table:table-cell>
          <table:table-cell table:style-name="ce69" table:formula="of:=SUBSTITUTE(TRIM(COM.MICROSOFT.CONCAT(IF([$C111.$C$7]=[.H$2];[$C111.$B$1] &amp; &quot; &quot;; &quot;&quot;); IF([$C112.$C$7]=[.H$2];[$C112.$B$1] &amp; &quot; &quot;; &quot;&quot;); IF([$C113.$C$7]=[.H$2];[$C113.$B$1] &amp; &quot; &quot;; &quot;&quot;))); &quot; &quot;; &quot;,&quot;)" office:value-type="string" office:string-value="C113" calcext:value-type="string">
            <text:p>C113</text:p>
          </table:table-cell>
          <table:table-cell table:style-name="ce69" table:formula="of:=SUBSTITUTE(TRIM(COM.MICROSOFT.CONCAT(IF([$C111.$C$7]=[.I$2];[$C111.$B$1] &amp; &quot; &quot;; &quot;&quot;); IF([$C112.$C$7]=[.I$2];[$C112.$B$1] &amp; &quot; &quot;; &quot;&quot;); IF([$C113.$C$7]=[.I$2];[$C113.$B$1] &amp; &quot; &quot;; &quot;&quot;))); &quot; &quot;; &quot;,&quot;)">
            <text:p/>
          </table:table-cell>
          <table:table-cell table:style-name="ce69" table:formula="of:=SUBSTITUTE(TRIM(COM.MICROSOFT.CONCAT(IF([$C111.$C$7]=[.J$2];[$C111.$B$1] &amp; &quot; &quot;; &quot;&quot;); IF([$C112.$C$7]=[.J$2];[$C112.$B$1] &amp; &quot; &quot;; &quot;&quot;); IF([$C113.$C$7]=[.J$2];[$C113.$B$1] &amp; &quot; &quot;; &quot;&quot;))); &quot; &quot;; &quot;,&quot;)">
            <text:p/>
          </table:table-cell>
          <table:table-cell table:style-name="ce69" table:formula="of:=SUBSTITUTE(TRIM(COM.MICROSOFT.CONCAT(IF([$C111.$C$7]=[.K$2];[$C111.$B$1] &amp; &quot; &quot;; &quot;&quot;); IF([$C112.$C$7]=[.K$2];[$C112.$B$1] &amp; &quot; &quot;; &quot;&quot;); IF([$C113.$C$7]=[.K$2];[$C113.$B$1] &amp; &quot; &quot;; &quot;&quot;))); &quot; &quot;; &quot;,&quot;)">
            <text:p/>
          </table:table-cell>
          <table:table-cell table:style-name="ce69" table:formula="of:=SUBSTITUTE(TRIM(COM.MICROSOFT.CONCAT(IF([$C111.$C$7]=[.L$2];[$C111.$B$1] &amp; &quot; &quot;; &quot;&quot;); IF([$C112.$C$7]=[.L$2];[$C112.$B$1] &amp; &quot; &quot;; &quot;&quot;); IF([$C113.$C$7]=[.L$2];[$C113.$B$1] &amp; &quot; &quot;; &quot;&quot;))); &quot; &quot;; &quot;,&quot;)">
            <text:p/>
          </table:table-cell>
          <table:table-cell/>
          <table:table-cell table:style-name="ce2"/>
        </table:table-row>
        <table:table-row table:style-name="ro1">
          <table:table-cell/>
          <table:table-cell office:value-type="string" calcext:value-type="string">
            <text:p>3ro</text:p>
          </table:table-cell>
          <table:table-cell table:style-name="ce69" table:formula="of:=SUBSTITUTE(TRIM(COM.MICROSOFT.CONCAT(IF([$C111.$C$9]=[.C$2];[$C111.$B$1] &amp; &quot; &quot;; &quot;&quot;); IF([$C112.$C$9]=[.C$2];[$C112.$B$1] &amp; &quot; &quot;; &quot;&quot;); IF([$C113.$C$9]=[.C$2];[$C113.$B$1] &amp; &quot; &quot;; &quot;&quot;))); &quot; &quot;; &quot;,&quot;)">
            <text:p/>
          </table:table-cell>
          <table:table-cell table:style-name="ce69" table:formula="of:=SUBSTITUTE(TRIM(COM.MICROSOFT.CONCAT(IF([$C111.$C$9]=[.D$2];[$C111.$B$1] &amp; &quot; &quot;; &quot;&quot;); IF([$C112.$C$9]=[.D$2];[$C112.$B$1] &amp; &quot; &quot;; &quot;&quot;); IF([$C113.$C$9]=[.D$2];[$C113.$B$1] &amp; &quot; &quot;; &quot;&quot;))); &quot; &quot;; &quot;,&quot;)">
            <text:p/>
          </table:table-cell>
          <table:table-cell table:style-name="ce69" table:formula="of:=SUBSTITUTE(TRIM(COM.MICROSOFT.CONCAT(IF([$C111.$C$9]=[.E$2];[$C111.$B$1] &amp; &quot; &quot;; &quot;&quot;); IF([$C112.$C$9]=[.E$2];[$C112.$B$1] &amp; &quot; &quot;; &quot;&quot;); IF([$C113.$C$9]=[.E$2];[$C113.$B$1] &amp; &quot; &quot;; &quot;&quot;))); &quot; &quot;; &quot;,&quot;)">
            <text:p/>
          </table:table-cell>
          <table:table-cell table:style-name="ce69" table:formula="of:=SUBSTITUTE(TRIM(COM.MICROSOFT.CONCAT(IF([$C111.$C$9]=[.F$2];[$C111.$B$1] &amp; &quot; &quot;; &quot;&quot;); IF([$C112.$C$9]=[.F$2];[$C112.$B$1] &amp; &quot; &quot;; &quot;&quot;); IF([$C113.$C$9]=[.F$2];[$C113.$B$1] &amp; &quot; &quot;; &quot;&quot;))); &quot; &quot;; &quot;,&quot;)">
            <text:p/>
          </table:table-cell>
          <table:table-cell table:style-name="ce69" table:formula="of:=SUBSTITUTE(TRIM(COM.MICROSOFT.CONCAT(IF([$C111.$C$9]=[.G$2];[$C111.$B$1] &amp; &quot; &quot;; &quot;&quot;); IF([$C112.$C$9]=[.G$2];[$C112.$B$1] &amp; &quot; &quot;; &quot;&quot;); IF([$C113.$C$9]=[.G$2];[$C113.$B$1] &amp; &quot; &quot;; &quot;&quot;))); &quot; &quot;; &quot;,&quot;)">
            <text:p/>
          </table:table-cell>
          <table:table-cell table:style-name="ce69" table:formula="of:=SUBSTITUTE(TRIM(COM.MICROSOFT.CONCAT(IF([$C111.$C$9]=[.H$2];[$C111.$B$1] &amp; &quot; &quot;; &quot;&quot;); IF([$C112.$C$9]=[.H$2];[$C112.$B$1] &amp; &quot; &quot;; &quot;&quot;); IF([$C113.$C$9]=[.H$2];[$C113.$B$1] &amp; &quot; &quot;; &quot;&quot;))); &quot; &quot;; &quot;,&quot;)" office:value-type="string" office:string-value="C111,C113" calcext:value-type="string">
            <text:p>C111,C113</text:p>
          </table:table-cell>
          <table:table-cell table:style-name="ce69" table:formula="of:=SUBSTITUTE(TRIM(COM.MICROSOFT.CONCAT(IF([$C111.$C$9]=[.I$2];[$C111.$B$1] &amp; &quot; &quot;; &quot;&quot;); IF([$C112.$C$9]=[.I$2];[$C112.$B$1] &amp; &quot; &quot;; &quot;&quot;); IF([$C113.$C$9]=[.I$2];[$C113.$B$1] &amp; &quot; &quot;; &quot;&quot;))); &quot; &quot;; &quot;,&quot;)">
            <text:p/>
          </table:table-cell>
          <table:table-cell table:style-name="ce69" table:formula="of:=SUBSTITUTE(TRIM(COM.MICROSOFT.CONCAT(IF([$C111.$C$9]=[.J$2];[$C111.$B$1] &amp; &quot; &quot;; &quot;&quot;); IF([$C112.$C$9]=[.J$2];[$C112.$B$1] &amp; &quot; &quot;; &quot;&quot;); IF([$C113.$C$9]=[.J$2];[$C113.$B$1] &amp; &quot; &quot;; &quot;&quot;))); &quot; &quot;; &quot;,&quot;)" office:value-type="string" office:string-value="C112" calcext:value-type="string">
            <text:p>C112</text:p>
          </table:table-cell>
          <table:table-cell table:style-name="ce69" table:formula="of:=SUBSTITUTE(TRIM(COM.MICROSOFT.CONCAT(IF([$C111.$C$9]=[.K$2];[$C111.$B$1] &amp; &quot; &quot;; &quot;&quot;); IF([$C112.$C$9]=[.K$2];[$C112.$B$1] &amp; &quot; &quot;; &quot;&quot;); IF([$C113.$C$9]=[.K$2];[$C113.$B$1] &amp; &quot; &quot;; &quot;&quot;))); &quot; &quot;; &quot;,&quot;)">
            <text:p/>
          </table:table-cell>
          <table:table-cell table:style-name="ce69" table:formula="of:=SUBSTITUTE(TRIM(COM.MICROSOFT.CONCAT(IF([$C111.$C$9]=[.L$2];[$C111.$B$1] &amp; &quot; &quot;; &quot;&quot;); IF([$C112.$C$9]=[.L$2];[$C112.$B$1] &amp; &quot; &quot;; &quot;&quot;); IF([$C113.$C$9]=[.L$2];[$C113.$B$1] &amp; &quot; &quot;; &quot;&quot;))); &quot; &quot;; &quot;,&quot;)">
            <text:p/>
          </table:table-cell>
          <table:table-cell/>
          <table:table-cell table:style-name="ce2"/>
        </table:table-row>
        <table:table-row table:style-name="ro1">
          <table:table-cell/>
          <table:table-cell office:value-type="string" calcext:value-type="string">
            <text:p>4to</text:p>
          </table:table-cell>
          <table:table-cell table:style-name="ce69" table:number-columns-repeated="10"/>
          <table:table-cell/>
          <table:table-cell table:style-name="ce2"/>
        </table:table-row>
        <table:table-row table:style-name="ro1">
          <table:table-cell/>
          <table:table-cell office:value-type="string" calcext:value-type="string">
            <text:p>5to</text:p>
          </table:table-cell>
          <table:table-cell table:style-name="ce69" table:number-columns-repeated="10"/>
          <table:table-cell/>
          <table:table-cell table:style-name="ce2"/>
        </table:table-row>
        <table:table-row table:style-name="ro1">
          <table:table-cell/>
          <table:table-cell office:value-type="string" calcext:value-type="string">
            <text:p>6to</text:p>
          </table:table-cell>
          <table:table-cell table:style-name="ce69" table:number-columns-repeated="10"/>
          <table:table-cell/>
          <table:table-cell table:style-name="ce2"/>
        </table:table-row>
        <table:table-row table:style-name="ro1">
          <table:table-cell/>
          <table:table-cell table:style-name="ce14" table:number-columns-repeated="11"/>
          <table:table-cell/>
          <table:table-cell table:style-name="ce2"/>
        </table:table-row>
        <table:table-row table:style-name="ro1">
          <table:table-cell/>
          <table:table-cell table:style-name="ce64" office:value-type="string" calcext:value-type="string">
            <text:p>Martes</text:p>
          </table:table-cell>
          <table:table-cell table:style-name="ce64" office:value-type="string" calcext:value-type="string">
            <text:p>Aula 1</text:p>
          </table:table-cell>
          <table:table-cell table:style-name="ce64" office:value-type="string" calcext:value-type="string">
            <text:p>Aula 2</text:p>
          </table:table-cell>
          <table:table-cell table:style-name="ce64" office:value-type="string" calcext:value-type="string">
            <text:p>Aula 3</text:p>
          </table:table-cell>
          <table:table-cell table:style-name="ce64" office:value-type="string" calcext:value-type="string">
            <text:p>Aula 4</text:p>
          </table:table-cell>
          <table:table-cell table:style-name="ce64" office:value-type="string" calcext:value-type="string">
            <text:p>Aula 5</text:p>
          </table:table-cell>
          <table:table-cell table:style-name="ce64" office:value-type="string" calcext:value-type="string">
            <text:p>Aula 6</text:p>
          </table:table-cell>
          <table:table-cell table:style-name="ce64" office:value-type="string" calcext:value-type="string">
            <text:p>Aula 7</text:p>
          </table:table-cell>
          <table:table-cell table:style-name="ce64" office:value-type="string" calcext:value-type="string">
            <text:p>Aula 8</text:p>
          </table:table-cell>
          <table:table-cell table:style-name="ce64" office:value-type="string" calcext:value-type="string">
            <text:p>Aula 9</text:p>
          </table:table-cell>
          <table:table-cell table:style-name="ce64" office:value-type="string" calcext:value-type="string">
            <text:p>Lab</text:p>
          </table:table-cell>
          <table:table-cell/>
          <table:table-cell table:style-name="ce2"/>
        </table:table-row>
        <table:table-row table:style-name="ro1">
          <table:table-cell/>
          <table:table-cell office:value-type="string" calcext:value-type="string">
            <text:p>1ro</text:p>
          </table:table-cell>
          <table:table-cell table:formula="of:=SUBSTITUTE(TRIM(COM.MICROSOFT.CONCAT(IF([$C111.$D5]=[.C$2];[$C111.$B$1] &amp; &quot; &quot;; &quot;&quot;); IF([$C112.$D5]=[.C$2];[$C112.$B$1] &amp; &quot; &quot;; &quot;&quot;); IF([$C113.$D5]=[.C$2];[$C113.$B$1] &amp; &quot; &quot;; &quot;&quot;))); &quot; &quot;; &quot;,&quot;)">
            <text:p/>
          </table:table-cell>
          <table:table-cell table:formula="of:=SUBSTITUTE(TRIM(COM.MICROSOFT.CONCAT(IF([$C111.$D5]=[.D$2];[$C111.$B1] &amp; &quot; &quot;; &quot;&quot;); IF([$C112.$D5]=[.D$2];[$C112.$B1] &amp; &quot; &quot;; &quot;&quot;); IF([$C113.$D5]=[.D$2];[$C113.$B1] &amp; &quot; &quot;; &quot;&quot;))); &quot; &quot;; &quot;,&quot;)" office:value-type="string" office:string-value="C112" calcext:value-type="string">
            <text:p>C112</text:p>
          </table:table-cell>
          <table:table-cell table:formula="of:=SUBSTITUTE(TRIM(COM.MICROSOFT.CONCAT(IF([$C111.$D5]=[.E$2];[$C111.$B1] &amp; &quot; &quot;; &quot;&quot;); IF([$C112.$D5]=[.E$2];[$C112.$B1] &amp; &quot; &quot;; &quot;&quot;); IF([$C113.$D5]=[.E$2];[$C113.$B1] &amp; &quot; &quot;; &quot;&quot;))); &quot; &quot;; &quot;,&quot;)">
            <text:p/>
          </table:table-cell>
          <table:table-cell table:formula="of:=SUBSTITUTE(TRIM(COM.MICROSOFT.CONCAT(IF([$C111.$D5]=[.F$2];[$C111.$B1] &amp; &quot; &quot;; &quot;&quot;); IF([$C112.$D5]=[.F$2];[$C112.$B1] &amp; &quot; &quot;; &quot;&quot;); IF([$C113.$D5]=[.F$2];[$C113.$B1] &amp; &quot; &quot;; &quot;&quot;))); &quot; &quot;; &quot;,&quot;)">
            <text:p/>
          </table:table-cell>
          <table:table-cell table:formula="of:=SUBSTITUTE(TRIM(COM.MICROSOFT.CONCAT(IF([$C111.$D5]=[.G$2];[$C111.$B1] &amp; &quot; &quot;; &quot;&quot;); IF([$C112.$D5]=[.G$2];[$C112.$B1] &amp; &quot; &quot;; &quot;&quot;); IF([$C113.$D5]=[.G$2];[$C113.$B1] &amp; &quot; &quot;; &quot;&quot;))); &quot; &quot;; &quot;,&quot;)">
            <text:p/>
          </table:table-cell>
          <table:table-cell table:formula="of:=SUBSTITUTE(TRIM(COM.MICROSOFT.CONCAT(IF([$C111.$D5]=[.H$2];[$C111.$B1] &amp; &quot; &quot;; &quot;&quot;); IF([$C112.$D5]=[.H$2];[$C112.$B1] &amp; &quot; &quot;; &quot;&quot;); IF([$C113.$D5]=[.H$2];[$C113.$B1] &amp; &quot; &quot;; &quot;&quot;))); &quot; &quot;; &quot;,&quot;)" office:value-type="string" office:string-value="C111" calcext:value-type="string">
            <text:p>C111</text:p>
          </table:table-cell>
          <table:table-cell table:formula="of:=SUBSTITUTE(TRIM(COM.MICROSOFT.CONCAT(IF([$C111.$D5]=[.I$2];[$C111.$B1] &amp; &quot; &quot;; &quot;&quot;); IF([$C112.$D5]=[.I$2];[$C112.$B1] &amp; &quot; &quot;; &quot;&quot;); IF([$C113.$D5]=[.I$2];[$C113.$B1] &amp; &quot; &quot;; &quot;&quot;))); &quot; &quot;; &quot;,&quot;)" office:value-type="string" office:string-value="C113" calcext:value-type="string">
            <text:p>C113</text:p>
          </table:table-cell>
          <table:table-cell table:formula="of:=SUBSTITUTE(TRIM(COM.MICROSOFT.CONCAT(IF([$C111.$D5]=[.J$2];[$C111.$B1] &amp; &quot; &quot;; &quot;&quot;); IF([$C112.$D5]=[.J$2];[$C112.$B1] &amp; &quot; &quot;; &quot;&quot;); IF([$C113.$D5]=[.J$2];[$C113.$B1] &amp; &quot; &quot;; &quot;&quot;))); &quot; &quot;; &quot;,&quot;)">
            <text:p/>
          </table:table-cell>
          <table:table-cell table:formula="of:=SUBSTITUTE(TRIM(COM.MICROSOFT.CONCAT(IF([$C111.$D5]=[.K$2];[$C111.$B1] &amp; &quot; &quot;; &quot;&quot;); IF([$C112.$D5]=[.K$2];[$C112.$B1] &amp; &quot; &quot;; &quot;&quot;); IF([$C113.$D5]=[.K$2];[$C113.$B1] &amp; &quot; &quot;; &quot;&quot;))); &quot; &quot;; &quot;,&quot;)">
            <text:p/>
          </table:table-cell>
          <table:table-cell table:formula="of:=SUBSTITUTE(TRIM(COM.MICROSOFT.CONCAT(IF([$C111.$D5]=[.L$2];[$C111.$B1] &amp; &quot; &quot;; &quot;&quot;); IF([$C112.$D5]=[.L$2];[$C112.$B1] &amp; &quot; &quot;; &quot;&quot;); IF([$C113.$D5]=[.L$2];[$C113.$B1] &amp; &quot; &quot;; &quot;&quot;))); &quot; &quot;; &quot;,&quot;)">
            <text:p/>
          </table:table-cell>
          <table:table-cell/>
          <table:table-cell table:style-name="ce2"/>
        </table:table-row>
        <table:table-row table:style-name="ro1">
          <table:table-cell/>
          <table:table-cell office:value-type="string" calcext:value-type="string">
            <text:p>2do</text:p>
          </table:table-cell>
          <table:table-cell table:formula="of:=SUBSTITUTE(TRIM(COM.MICROSOFT.CONCAT(IF([$C111.$D7]=[.C$2];[$C111.$B$1] &amp; &quot; &quot;; &quot;&quot;); IF([$C112.$D7]=[.C$2];[$C112.$B$1] &amp; &quot; &quot;; &quot;&quot;); IF([$C113.$D7]=[.C$2];[$C113.$B$1] &amp; &quot; &quot;; &quot;&quot;))); &quot; &quot;; &quot;,&quot;)" office:value-type="string" office:string-value="C111" calcext:value-type="string">
            <text:p>C111</text:p>
          </table:table-cell>
          <table:table-cell table:formula="of:=SUBSTITUTE(TRIM(COM.MICROSOFT.CONCAT(IF([$C111.$D7]=[.D$2];[$C111.$B$1] &amp; &quot; &quot;; &quot;&quot;); IF([$C112.$D7]=[.D$2];[$C112.$B$1] &amp; &quot; &quot;; &quot;&quot;); IF([$C113.$D7]=[.D$2];[$C113.$B$1] &amp; &quot; &quot;; &quot;&quot;))); &quot; &quot;; &quot;,&quot;)">
            <text:p/>
          </table:table-cell>
          <table:table-cell table:formula="of:=SUBSTITUTE(TRIM(COM.MICROSOFT.CONCAT(IF([$C111.$D7]=[.E$2];[$C111.$B$1] &amp; &quot; &quot;; &quot;&quot;); IF([$C112.$D7]=[.E$2];[$C112.$B$1] &amp; &quot; &quot;; &quot;&quot;); IF([$C113.$D7]=[.E$2];[$C113.$B$1] &amp; &quot; &quot;; &quot;&quot;))); &quot; &quot;; &quot;,&quot;)">
            <text:p/>
          </table:table-cell>
          <table:table-cell table:formula="of:=SUBSTITUTE(TRIM(COM.MICROSOFT.CONCAT(IF([$C111.$D7]=[.F$2];[$C111.$B$1] &amp; &quot; &quot;; &quot;&quot;); IF([$C112.$D7]=[.F$2];[$C112.$B$1] &amp; &quot; &quot;; &quot;&quot;); IF([$C113.$D7]=[.F$2];[$C113.$B$1] &amp; &quot; &quot;; &quot;&quot;))); &quot; &quot;; &quot;,&quot;)">
            <text:p/>
          </table:table-cell>
          <table:table-cell table:formula="of:=SUBSTITUTE(TRIM(COM.MICROSOFT.CONCAT(IF([$C111.$D7]=[.G$2];[$C111.$B$1] &amp; &quot; &quot;; &quot;&quot;); IF([$C112.$D7]=[.G$2];[$C112.$B$1] &amp; &quot; &quot;; &quot;&quot;); IF([$C113.$D7]=[.G$2];[$C113.$B$1] &amp; &quot; &quot;; &quot;&quot;))); &quot; &quot;; &quot;,&quot;)">
            <text:p/>
          </table:table-cell>
          <table:table-cell table:formula="of:=SUBSTITUTE(TRIM(COM.MICROSOFT.CONCAT(IF([$C111.$D7]=[.H$2];[$C111.$B$1] &amp; &quot; &quot;; &quot;&quot;); IF([$C112.$D7]=[.H$2];[$C112.$B$1] &amp; &quot; &quot;; &quot;&quot;); IF([$C113.$D7]=[.H$2];[$C113.$B$1] &amp; &quot; &quot;; &quot;&quot;))); &quot; &quot;; &quot;,&quot;)" office:value-type="string" office:string-value="C112,C113" calcext:value-type="string">
            <text:p>C112,C113</text:p>
          </table:table-cell>
          <table:table-cell table:formula="of:=SUBSTITUTE(TRIM(COM.MICROSOFT.CONCAT(IF([$C111.$D7]=[.I$2];[$C111.$B$1] &amp; &quot; &quot;; &quot;&quot;); IF([$C112.$D7]=[.I$2];[$C112.$B$1] &amp; &quot; &quot;; &quot;&quot;); IF([$C113.$D7]=[.I$2];[$C113.$B$1] &amp; &quot; &quot;; &quot;&quot;))); &quot; &quot;; &quot;,&quot;)">
            <text:p/>
          </table:table-cell>
          <table:table-cell table:formula="of:=SUBSTITUTE(TRIM(COM.MICROSOFT.CONCAT(IF([$C111.$D7]=[.J$2];[$C111.$B$1] &amp; &quot; &quot;; &quot;&quot;); IF([$C112.$D7]=[.J$2];[$C112.$B$1] &amp; &quot; &quot;; &quot;&quot;); IF([$C113.$D7]=[.J$2];[$C113.$B$1] &amp; &quot; &quot;; &quot;&quot;))); &quot; &quot;; &quot;,&quot;)">
            <text:p/>
          </table:table-cell>
          <table:table-cell table:formula="of:=SUBSTITUTE(TRIM(COM.MICROSOFT.CONCAT(IF([$C111.$D7]=[.K$2];[$C111.$B$1] &amp; &quot; &quot;; &quot;&quot;); IF([$C112.$D7]=[.K$2];[$C112.$B$1] &amp; &quot; &quot;; &quot;&quot;); IF([$C113.$D7]=[.K$2];[$C113.$B$1] &amp; &quot; &quot;; &quot;&quot;))); &quot; &quot;; &quot;,&quot;)">
            <text:p/>
          </table:table-cell>
          <table:table-cell table:formula="of:=SUBSTITUTE(TRIM(COM.MICROSOFT.CONCAT(IF([$C111.$D7]=[.L$2];[$C111.$B$1] &amp; &quot; &quot;; &quot;&quot;); IF([$C112.$D7]=[.L$2];[$C112.$B$1] &amp; &quot; &quot;; &quot;&quot;); IF([$C113.$D7]=[.L$2];[$C113.$B$1] &amp; &quot; &quot;; &quot;&quot;))); &quot; &quot;; &quot;,&quot;)">
            <text:p/>
          </table:table-cell>
          <table:table-cell/>
          <table:table-cell table:style-name="ce2"/>
        </table:table-row>
        <table:table-row table:style-name="ro1">
          <table:table-cell/>
          <table:table-cell office:value-type="string" calcext:value-type="string">
            <text:p>3ro</text:p>
          </table:table-cell>
          <table:table-cell table:formula="of:=SUBSTITUTE(TRIM(COM.MICROSOFT.CONCAT(IF([$C111.$D9]=[.C$2];[$C111.$B$1] &amp; &quot; &quot;; &quot;&quot;); IF([$C112.$D9]=[.C$2];[$C112.$B$1] &amp; &quot; &quot;; &quot;&quot;); IF([$C113.$D9]=[.C$2];[$C113.$B$1] &amp; &quot; &quot;; &quot;&quot;))); &quot; &quot;; &quot;,&quot;)">
            <text:p/>
          </table:table-cell>
          <table:table-cell table:formula="of:=SUBSTITUTE(TRIM(COM.MICROSOFT.CONCAT(IF([$C111.$D9]=[.D$2];[$C111.$B$1] &amp; &quot; &quot;; &quot;&quot;); IF([$C112.$D9]=[.D$2];[$C112.$B$1] &amp; &quot; &quot;; &quot;&quot;); IF([$C113.$D9]=[.D$2];[$C113.$B$1] &amp; &quot; &quot;; &quot;&quot;))); &quot; &quot;; &quot;,&quot;)">
            <text:p/>
          </table:table-cell>
          <table:table-cell table:formula="of:=SUBSTITUTE(TRIM(COM.MICROSOFT.CONCAT(IF([$C111.$D9]=[.E$2];[$C111.$B$1] &amp; &quot; &quot;; &quot;&quot;); IF([$C112.$D9]=[.E$2];[$C112.$B$1] &amp; &quot; &quot;; &quot;&quot;); IF([$C113.$D9]=[.E$2];[$C113.$B$1] &amp; &quot; &quot;; &quot;&quot;))); &quot; &quot;; &quot;,&quot;)">
            <text:p/>
          </table:table-cell>
          <table:table-cell table:formula="of:=SUBSTITUTE(TRIM(COM.MICROSOFT.CONCAT(IF([$C111.$D9]=[.F$2];[$C111.$B$1] &amp; &quot; &quot;; &quot;&quot;); IF([$C112.$D9]=[.F$2];[$C112.$B$1] &amp; &quot; &quot;; &quot;&quot;); IF([$C113.$D9]=[.F$2];[$C113.$B$1] &amp; &quot; &quot;; &quot;&quot;))); &quot; &quot;; &quot;,&quot;)">
            <text:p/>
          </table:table-cell>
          <table:table-cell table:formula="of:=SUBSTITUTE(TRIM(COM.MICROSOFT.CONCAT(IF([$C111.$D9]=[.G$2];[$C111.$B$1] &amp; &quot; &quot;; &quot;&quot;); IF([$C112.$D9]=[.G$2];[$C112.$B$1] &amp; &quot; &quot;; &quot;&quot;); IF([$C113.$D9]=[.G$2];[$C113.$B$1] &amp; &quot; &quot;; &quot;&quot;))); &quot; &quot;; &quot;,&quot;)">
            <text:p/>
          </table:table-cell>
          <table:table-cell table:formula="of:=SUBSTITUTE(TRIM(COM.MICROSOFT.CONCAT(IF([$C111.$D9]=[.H$2];[$C111.$B$1] &amp; &quot; &quot;; &quot;&quot;); IF([$C112.$D9]=[.H$2];[$C112.$B$1] &amp; &quot; &quot;; &quot;&quot;); IF([$C113.$D9]=[.H$2];[$C113.$B$1] &amp; &quot; &quot;; &quot;&quot;))); &quot; &quot;; &quot;,&quot;)" office:value-type="string" office:string-value="C111,C112,C113" calcext:value-type="string">
            <text:p>C111,C112,C113</text:p>
          </table:table-cell>
          <table:table-cell table:formula="of:=SUBSTITUTE(TRIM(COM.MICROSOFT.CONCAT(IF([$C111.$D9]=[.I$2];[$C111.$B$1] &amp; &quot; &quot;; &quot;&quot;); IF([$C112.$D9]=[.I$2];[$C112.$B$1] &amp; &quot; &quot;; &quot;&quot;); IF([$C113.$D9]=[.I$2];[$C113.$B$1] &amp; &quot; &quot;; &quot;&quot;))); &quot; &quot;; &quot;,&quot;)">
            <text:p/>
          </table:table-cell>
          <table:table-cell table:formula="of:=SUBSTITUTE(TRIM(COM.MICROSOFT.CONCAT(IF([$C111.$D9]=[.J$2];[$C111.$B$1] &amp; &quot; &quot;; &quot;&quot;); IF([$C112.$D9]=[.J$2];[$C112.$B$1] &amp; &quot; &quot;; &quot;&quot;); IF([$C113.$D9]=[.J$2];[$C113.$B$1] &amp; &quot; &quot;; &quot;&quot;))); &quot; &quot;; &quot;,&quot;)">
            <text:p/>
          </table:table-cell>
          <table:table-cell table:formula="of:=SUBSTITUTE(TRIM(COM.MICROSOFT.CONCAT(IF([$C111.$D9]=[.K$2];[$C111.$B$1] &amp; &quot; &quot;; &quot;&quot;); IF([$C112.$D9]=[.K$2];[$C112.$B$1] &amp; &quot; &quot;; &quot;&quot;); IF([$C113.$D9]=[.K$2];[$C113.$B$1] &amp; &quot; &quot;; &quot;&quot;))); &quot; &quot;; &quot;,&quot;)">
            <text:p/>
          </table:table-cell>
          <table:table-cell table:formula="of:=SUBSTITUTE(TRIM(COM.MICROSOFT.CONCAT(IF([$C111.$D9]=[.L$2];[$C111.$B$1] &amp; &quot; &quot;; &quot;&quot;); IF([$C112.$D9]=[.L$2];[$C112.$B$1] &amp; &quot; &quot;; &quot;&quot;); IF([$C113.$D9]=[.L$2];[$C113.$B$1] &amp; &quot; &quot;; &quot;&quot;))); &quot; &quot;; &quot;,&quot;)">
            <text:p/>
          </table:table-cell>
          <table:table-cell/>
          <table:table-cell table:style-name="ce2"/>
        </table:table-row>
        <table:table-row table:style-name="ro1">
          <table:table-cell/>
          <table:table-cell office:value-type="string" calcext:value-type="string">
            <text:p>4t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5t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6to</text:p>
          </table:table-cell>
          <table:table-cell table:number-columns-repeated="12"/>
        </table:table-row>
        <table:table-row table:style-name="ro1">
          <table:table-cell/>
          <table:table-cell table:style-name="Default" table:number-columns-repeated="11"/>
          <table:table-cell table:number-columns-repeated="2"/>
        </table:table-row>
        <table:table-row table:style-name="ro1">
          <table:table-cell/>
          <table:table-cell table:style-name="ce64" office:value-type="string" calcext:value-type="string">
            <text:p>Miércoles</text:p>
          </table:table-cell>
          <table:table-cell table:style-name="ce64" office:value-type="string" calcext:value-type="string">
            <text:p>Aula 1</text:p>
          </table:table-cell>
          <table:table-cell table:style-name="ce64" office:value-type="string" calcext:value-type="string">
            <text:p>Aula 2</text:p>
          </table:table-cell>
          <table:table-cell table:style-name="ce64" office:value-type="string" calcext:value-type="string">
            <text:p>Aula 3</text:p>
          </table:table-cell>
          <table:table-cell table:style-name="ce64" office:value-type="string" calcext:value-type="string">
            <text:p>Aula 4</text:p>
          </table:table-cell>
          <table:table-cell table:style-name="ce64" office:value-type="string" calcext:value-type="string">
            <text:p>Aula 5</text:p>
          </table:table-cell>
          <table:table-cell table:style-name="ce64" office:value-type="string" calcext:value-type="string">
            <text:p>Aula 6</text:p>
          </table:table-cell>
          <table:table-cell table:style-name="ce64" office:value-type="string" calcext:value-type="string">
            <text:p>Aula 7</text:p>
          </table:table-cell>
          <table:table-cell table:style-name="ce64" office:value-type="string" calcext:value-type="string">
            <text:p>Aula 8</text:p>
          </table:table-cell>
          <table:table-cell table:style-name="ce64" office:value-type="string" calcext:value-type="string">
            <text:p>Aula 9</text:p>
          </table:table-cell>
          <table:table-cell table:style-name="ce64" office:value-type="string" calcext:value-type="string">
            <text:p>La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ro</text:p>
          </table:table-cell>
          <table:table-cell table:formula="of:=SUBSTITUTE(TRIM(COM.MICROSOFT.CONCAT(IF([$C111.$E5]=[.C$2];[$C111.$B$1] &amp; &quot; &quot;; &quot;&quot;); IF([$C112.$E5]=[.C$2];[$C112.$B$1] &amp; &quot; &quot;; &quot;&quot;); IF([$C113.$E5]=[.C$2];[$C113.$B$1] &amp; &quot; &quot;; &quot;&quot;))); &quot; &quot;; &quot;,&quot;)">
            <text:p/>
          </table:table-cell>
          <table:table-cell table:formula="of:=SUBSTITUTE(TRIM(COM.MICROSOFT.CONCAT(IF([$C111.$E5]=[.D$2];[$C111.$B$1] &amp; &quot; &quot;; &quot;&quot;); IF([$C112.$E5]=[.D$2];[$C112.$B$1] &amp; &quot; &quot;; &quot;&quot;); IF([$C113.$E5]=[.D$2];[$C113.$B$1] &amp; &quot; &quot;; &quot;&quot;))); &quot; &quot;; &quot;,&quot;)">
            <text:p/>
          </table:table-cell>
          <table:table-cell table:formula="of:=SUBSTITUTE(TRIM(COM.MICROSOFT.CONCAT(IF([$C111.$E5]=[.E$2];[$C111.$B$1] &amp; &quot; &quot;; &quot;&quot;); IF([$C112.$E5]=[.E$2];[$C112.$B$1] &amp; &quot; &quot;; &quot;&quot;); IF([$C113.$E5]=[.E$2];[$C113.$B$1] &amp; &quot; &quot;; &quot;&quot;))); &quot; &quot;; &quot;,&quot;)">
            <text:p/>
          </table:table-cell>
          <table:table-cell table:formula="of:=SUBSTITUTE(TRIM(COM.MICROSOFT.CONCAT(IF([$C111.$E5]=[.F$2];[$C111.$B$1] &amp; &quot; &quot;; &quot;&quot;); IF([$C112.$E5]=[.F$2];[$C112.$B$1] &amp; &quot; &quot;; &quot;&quot;); IF([$C113.$E5]=[.F$2];[$C113.$B$1] &amp; &quot; &quot;; &quot;&quot;))); &quot; &quot;; &quot;,&quot;)">
            <text:p/>
          </table:table-cell>
          <table:table-cell table:formula="of:=SUBSTITUTE(TRIM(COM.MICROSOFT.CONCAT(IF([$C111.$E5]=[.G$2];[$C111.$B$1] &amp; &quot; &quot;; &quot;&quot;); IF([$C112.$E5]=[.G$2];[$C112.$B$1] &amp; &quot; &quot;; &quot;&quot;); IF([$C113.$E5]=[.G$2];[$C113.$B$1] &amp; &quot; &quot;; &quot;&quot;))); &quot; &quot;; &quot;,&quot;)" office:value-type="string" office:string-value="C112" calcext:value-type="string">
            <text:p>C112</text:p>
          </table:table-cell>
          <table:table-cell table:formula="of:=SUBSTITUTE(TRIM(COM.MICROSOFT.CONCAT(IF([$C111.$E5]=[.H$2];[$C111.$B$1] &amp; &quot; &quot;; &quot;&quot;); IF([$C112.$E5]=[.H$2];[$C112.$B$1] &amp; &quot; &quot;; &quot;&quot;); IF([$C113.$E5]=[.H$2];[$C113.$B$1] &amp; &quot; &quot;; &quot;&quot;))); &quot; &quot;; &quot;,&quot;)" office:value-type="string" office:string-value="C111" calcext:value-type="string">
            <text:p>C111</text:p>
          </table:table-cell>
          <table:table-cell table:formula="of:=SUBSTITUTE(TRIM(COM.MICROSOFT.CONCAT(IF([$C111.$E5]=[.I$2];[$C111.$B$1] &amp; &quot; &quot;; &quot;&quot;); IF([$C112.$E5]=[.I$2];[$C112.$B$1] &amp; &quot; &quot;; &quot;&quot;); IF([$C113.$E5]=[.I$2];[$C113.$B$1] &amp; &quot; &quot;; &quot;&quot;))); &quot; &quot;; &quot;,&quot;)">
            <text:p/>
          </table:table-cell>
          <table:table-cell table:formula="of:=SUBSTITUTE(TRIM(COM.MICROSOFT.CONCAT(IF([$C111.$E5]=[.J$2];[$C111.$B$1] &amp; &quot; &quot;; &quot;&quot;); IF([$C112.$E5]=[.J$2];[$C112.$B$1] &amp; &quot; &quot;; &quot;&quot;); IF([$C113.$E5]=[.J$2];[$C113.$B$1] &amp; &quot; &quot;; &quot;&quot;))); &quot; &quot;; &quot;,&quot;)" office:value-type="string" office:string-value="C113" calcext:value-type="string">
            <text:p>C113</text:p>
          </table:table-cell>
          <table:table-cell table:formula="of:=SUBSTITUTE(TRIM(COM.MICROSOFT.CONCAT(IF([$C111.$E5]=[.K$2];[$C111.$B$1] &amp; &quot; &quot;; &quot;&quot;); IF([$C112.$E5]=[.K$2];[$C112.$B$1] &amp; &quot; &quot;; &quot;&quot;); IF([$C113.$E5]=[.K$2];[$C113.$B$1] &amp; &quot; &quot;; &quot;&quot;))); &quot; &quot;; &quot;,&quot;)">
            <text:p/>
          </table:table-cell>
          <table:table-cell table:formula="of:=SUBSTITUTE(TRIM(COM.MICROSOFT.CONCAT(IF([$C111.$E5]=[.L$2];[$C111.$B$1] &amp; &quot; &quot;; &quot;&quot;); IF([$C112.$E5]=[.L$2];[$C112.$B$1] &amp; &quot; &quot;; &quot;&quot;); IF([$C113.$E5]=[.L$2];[$C113.$B$1] &amp; &quot; &quot;; &quot;&quot;))); &quot; &quot;; &quot;,&quot;)">
            <text:p/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do</text:p>
          </table:table-cell>
          <table:table-cell table:formula="of:=SUBSTITUTE(TRIM(COM.MICROSOFT.CONCAT(IF([$C111.$E7]=[.C$2];[$C111.$B$1] &amp; &quot; &quot;; &quot;&quot;); IF([$C112.$E7]=[.C$2];[$C112.$B$1] &amp; &quot; &quot;; &quot;&quot;); IF([$C113.$E7]=[.C$2];[$C113.$B$1] &amp; &quot; &quot;; &quot;&quot;))); &quot; &quot;; &quot;,&quot;)">
            <text:p/>
          </table:table-cell>
          <table:table-cell table:formula="of:=SUBSTITUTE(TRIM(COM.MICROSOFT.CONCAT(IF([$C111.$E7]=[.D$2];[$C111.$B$1] &amp; &quot; &quot;; &quot;&quot;); IF([$C112.$E7]=[.D$2];[$C112.$B$1] &amp; &quot; &quot;; &quot;&quot;); IF([$C113.$E7]=[.D$2];[$C113.$B$1] &amp; &quot; &quot;; &quot;&quot;))); &quot; &quot;; &quot;,&quot;)">
            <text:p/>
          </table:table-cell>
          <table:table-cell table:formula="of:=SUBSTITUTE(TRIM(COM.MICROSOFT.CONCAT(IF([$C111.$E7]=[.E$2];[$C111.$B$1] &amp; &quot; &quot;; &quot;&quot;); IF([$C112.$E7]=[.E$2];[$C112.$B$1] &amp; &quot; &quot;; &quot;&quot;); IF([$C113.$E7]=[.E$2];[$C113.$B$1] &amp; &quot; &quot;; &quot;&quot;))); &quot; &quot;; &quot;,&quot;)">
            <text:p/>
          </table:table-cell>
          <table:table-cell table:formula="of:=SUBSTITUTE(TRIM(COM.MICROSOFT.CONCAT(IF([$C111.$E7]=[.F$2];[$C111.$B$1] &amp; &quot; &quot;; &quot;&quot;); IF([$C112.$E7]=[.F$2];[$C112.$B$1] &amp; &quot; &quot;; &quot;&quot;); IF([$C113.$E7]=[.F$2];[$C113.$B$1] &amp; &quot; &quot;; &quot;&quot;))); &quot; &quot;; &quot;,&quot;)">
            <text:p/>
          </table:table-cell>
          <table:table-cell table:formula="of:=SUBSTITUTE(TRIM(COM.MICROSOFT.CONCAT(IF([$C111.$E7]=[.G$2];[$C111.$B$1] &amp; &quot; &quot;; &quot;&quot;); IF([$C112.$E7]=[.G$2];[$C112.$B$1] &amp; &quot; &quot;; &quot;&quot;); IF([$C113.$E7]=[.G$2];[$C113.$B$1] &amp; &quot; &quot;; &quot;&quot;))); &quot; &quot;; &quot;,&quot;)">
            <text:p/>
          </table:table-cell>
          <table:table-cell table:formula="of:=SUBSTITUTE(TRIM(COM.MICROSOFT.CONCAT(IF([$C111.$E7]=[.H$2];[$C111.$B$1] &amp; &quot; &quot;; &quot;&quot;); IF([$C112.$E7]=[.H$2];[$C112.$B$1] &amp; &quot; &quot;; &quot;&quot;); IF([$C113.$E7]=[.H$2];[$C113.$B$1] &amp; &quot; &quot;; &quot;&quot;))); &quot; &quot;; &quot;,&quot;)">
            <text:p/>
          </table:table-cell>
          <table:table-cell table:formula="of:=SUBSTITUTE(TRIM(COM.MICROSOFT.CONCAT(IF([$C111.$E7]=[.I$2];[$C111.$B$1] &amp; &quot; &quot;; &quot;&quot;); IF([$C112.$E7]=[.I$2];[$C112.$B$1] &amp; &quot; &quot;; &quot;&quot;); IF([$C113.$E7]=[.I$2];[$C113.$B$1] &amp; &quot; &quot;; &quot;&quot;))); &quot; &quot;; &quot;,&quot;)">
            <text:p/>
          </table:table-cell>
          <table:table-cell table:formula="of:=SUBSTITUTE(TRIM(COM.MICROSOFT.CONCAT(IF([$C111.$E7]=[.J$2];[$C111.$B$1] &amp; &quot; &quot;; &quot;&quot;); IF([$C112.$E7]=[.J$2];[$C112.$B$1] &amp; &quot; &quot;; &quot;&quot;); IF([$C113.$E7]=[.J$2];[$C113.$B$1] &amp; &quot; &quot;; &quot;&quot;))); &quot; &quot;; &quot;,&quot;)">
            <text:p/>
          </table:table-cell>
          <table:table-cell table:formula="of:=SUBSTITUTE(TRIM(COM.MICROSOFT.CONCAT(IF([$C111.$E7]=[.K$2];[$C111.$B$1] &amp; &quot; &quot;; &quot;&quot;); IF([$C112.$E7]=[.K$2];[$C112.$B$1] &amp; &quot; &quot;; &quot;&quot;); IF([$C113.$E7]=[.K$2];[$C113.$B$1] &amp; &quot; &quot;; &quot;&quot;))); &quot; &quot;; &quot;,&quot;)">
            <text:p/>
          </table:table-cell>
          <table:table-cell table:formula="of:=SUBSTITUTE(TRIM(COM.MICROSOFT.CONCAT(IF([$C111.$E7]=[.L$2];[$C111.$B$1] &amp; &quot; &quot;; &quot;&quot;); IF([$C112.$E7]=[.L$2];[$C112.$B$1] &amp; &quot; &quot;; &quot;&quot;); IF([$C113.$E7]=[.L$2];[$C113.$B$1] &amp; &quot; &quot;; &quot;&quot;))); &quot; &quot;; &quot;,&quot;)">
            <text:p/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ro</text:p>
          </table:table-cell>
          <table:table-cell table:formula="of:=SUBSTITUTE(TRIM(COM.MICROSOFT.CONCAT(IF([$C111.$E9]=[.C$2];[$C111.$B$1] &amp; &quot; &quot;; &quot;&quot;); IF([$C112.$E9]=[.C$2];[$C112.$B$1] &amp; &quot; &quot;; &quot;&quot;); IF([$C113.$E9]=[.C$2];[$C113.$B$1] &amp; &quot; &quot;; &quot;&quot;))); &quot; &quot;; &quot;,&quot;)">
            <text:p/>
          </table:table-cell>
          <table:table-cell table:formula="of:=SUBSTITUTE(TRIM(COM.MICROSOFT.CONCAT(IF([$C111.$E9]=[.D$2];[$C111.$B$1] &amp; &quot; &quot;; &quot;&quot;); IF([$C112.$E9]=[.D$2];[$C112.$B$1] &amp; &quot; &quot;; &quot;&quot;); IF([$C113.$E9]=[.D$2];[$C113.$B$1] &amp; &quot; &quot;; &quot;&quot;))); &quot; &quot;; &quot;,&quot;)" office:value-type="string" office:string-value="C112" calcext:value-type="string">
            <text:p>C112</text:p>
          </table:table-cell>
          <table:table-cell table:formula="of:=SUBSTITUTE(TRIM(COM.MICROSOFT.CONCAT(IF([$C111.$E9]=[.E$2];[$C111.$B$1] &amp; &quot; &quot;; &quot;&quot;); IF([$C112.$E9]=[.E$2];[$C112.$B$1] &amp; &quot; &quot;; &quot;&quot;); IF([$C113.$E9]=[.E$2];[$C113.$B$1] &amp; &quot; &quot;; &quot;&quot;))); &quot; &quot;; &quot;,&quot;)">
            <text:p/>
          </table:table-cell>
          <table:table-cell table:formula="of:=SUBSTITUTE(TRIM(COM.MICROSOFT.CONCAT(IF([$C111.$E9]=[.F$2];[$C111.$B$1] &amp; &quot; &quot;; &quot;&quot;); IF([$C112.$E9]=[.F$2];[$C112.$B$1] &amp; &quot; &quot;; &quot;&quot;); IF([$C113.$E9]=[.F$2];[$C113.$B$1] &amp; &quot; &quot;; &quot;&quot;))); &quot; &quot;; &quot;,&quot;)">
            <text:p/>
          </table:table-cell>
          <table:table-cell table:formula="of:=SUBSTITUTE(TRIM(COM.MICROSOFT.CONCAT(IF([$C111.$E9]=[.G$2];[$C111.$B$1] &amp; &quot; &quot;; &quot;&quot;); IF([$C112.$E9]=[.G$2];[$C112.$B$1] &amp; &quot; &quot;; &quot;&quot;); IF([$C113.$E9]=[.G$2];[$C113.$B$1] &amp; &quot; &quot;; &quot;&quot;))); &quot; &quot;; &quot;,&quot;)" office:value-type="string" office:string-value="C113" calcext:value-type="string">
            <text:p>C113</text:p>
          </table:table-cell>
          <table:table-cell table:formula="of:=SUBSTITUTE(TRIM(COM.MICROSOFT.CONCAT(IF([$C111.$E9]=[.H$2];[$C111.$B$1] &amp; &quot; &quot;; &quot;&quot;); IF([$C112.$E9]=[.H$2];[$C112.$B$1] &amp; &quot; &quot;; &quot;&quot;); IF([$C113.$E9]=[.H$2];[$C113.$B$1] &amp; &quot; &quot;; &quot;&quot;))); &quot; &quot;; &quot;,&quot;)" office:value-type="string" office:string-value="C111" calcext:value-type="string">
            <text:p>C111</text:p>
          </table:table-cell>
          <table:table-cell table:formula="of:=SUBSTITUTE(TRIM(COM.MICROSOFT.CONCAT(IF([$C111.$E9]=[.I$2];[$C111.$B$1] &amp; &quot; &quot;; &quot;&quot;); IF([$C112.$E9]=[.I$2];[$C112.$B$1] &amp; &quot; &quot;; &quot;&quot;); IF([$C113.$E9]=[.I$2];[$C113.$B$1] &amp; &quot; &quot;; &quot;&quot;))); &quot; &quot;; &quot;,&quot;)">
            <text:p/>
          </table:table-cell>
          <table:table-cell table:formula="of:=SUBSTITUTE(TRIM(COM.MICROSOFT.CONCAT(IF([$C111.$E9]=[.J$2];[$C111.$B$1] &amp; &quot; &quot;; &quot;&quot;); IF([$C112.$E9]=[.J$2];[$C112.$B$1] &amp; &quot; &quot;; &quot;&quot;); IF([$C113.$E9]=[.J$2];[$C113.$B$1] &amp; &quot; &quot;; &quot;&quot;))); &quot; &quot;; &quot;,&quot;)">
            <text:p/>
          </table:table-cell>
          <table:table-cell table:formula="of:=SUBSTITUTE(TRIM(COM.MICROSOFT.CONCAT(IF([$C111.$E9]=[.K$2];[$C111.$B$1] &amp; &quot; &quot;; &quot;&quot;); IF([$C112.$E9]=[.K$2];[$C112.$B$1] &amp; &quot; &quot;; &quot;&quot;); IF([$C113.$E9]=[.K$2];[$C113.$B$1] &amp; &quot; &quot;; &quot;&quot;))); &quot; &quot;; &quot;,&quot;)">
            <text:p/>
          </table:table-cell>
          <table:table-cell table:formula="of:=SUBSTITUTE(TRIM(COM.MICROSOFT.CONCAT(IF([$C111.$E9]=[.L$2];[$C111.$B$1] &amp; &quot; &quot;; &quot;&quot;); IF([$C112.$E9]=[.L$2];[$C112.$B$1] &amp; &quot; &quot;; &quot;&quot;); IF([$C113.$E9]=[.L$2];[$C113.$B$1] &amp; &quot; &quot;; &quot;&quot;))); &quot; &quot;; &quot;,&quot;)">
            <text:p/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4t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5t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6to</text:p>
          </table:table-cell>
          <table:table-cell table:number-columns-repeated="12"/>
        </table:table-row>
        <table:table-row table:style-name="ro1">
          <table:table-cell/>
          <table:table-cell table:style-name="Default" table:number-columns-repeated="11"/>
          <table:table-cell table:number-columns-repeated="2"/>
        </table:table-row>
        <table:table-row table:style-name="ro1">
          <table:table-cell/>
          <table:table-cell table:style-name="ce64" office:value-type="string" calcext:value-type="string">
            <text:p>Jueves</text:p>
          </table:table-cell>
          <table:table-cell table:style-name="ce64" office:value-type="string" calcext:value-type="string">
            <text:p>Aula 1</text:p>
          </table:table-cell>
          <table:table-cell table:style-name="ce64" office:value-type="string" calcext:value-type="string">
            <text:p>Aula 2</text:p>
          </table:table-cell>
          <table:table-cell table:style-name="ce64" office:value-type="string" calcext:value-type="string">
            <text:p>Aula 3</text:p>
          </table:table-cell>
          <table:table-cell table:style-name="ce64" office:value-type="string" calcext:value-type="string">
            <text:p>Aula 4</text:p>
          </table:table-cell>
          <table:table-cell table:style-name="ce64" office:value-type="string" calcext:value-type="string">
            <text:p>Aula 5</text:p>
          </table:table-cell>
          <table:table-cell table:style-name="ce64" office:value-type="string" calcext:value-type="string">
            <text:p>Aula 6</text:p>
          </table:table-cell>
          <table:table-cell table:style-name="ce64" office:value-type="string" calcext:value-type="string">
            <text:p>Aula 7</text:p>
          </table:table-cell>
          <table:table-cell table:style-name="ce64" office:value-type="string" calcext:value-type="string">
            <text:p>Aula 8</text:p>
          </table:table-cell>
          <table:table-cell table:style-name="ce64" office:value-type="string" calcext:value-type="string">
            <text:p>Aula 9</text:p>
          </table:table-cell>
          <table:table-cell table:style-name="ce64" office:value-type="string" calcext:value-type="string">
            <text:p>La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ro</text:p>
          </table:table-cell>
          <table:table-cell table:formula="of:=SUBSTITUTE(TRIM(COM.MICROSOFT.CONCAT(IF([$C111.$F5]=[.C$2];[$C111.$B$1] &amp; &quot; &quot;; &quot;&quot;); IF([$C112.$F5]=[.C$2];[$C112.$B$1] &amp; &quot; &quot;; &quot;&quot;); IF([$C113.$F5]=[.C$2];[$C113.$B$1] &amp; &quot; &quot;; &quot;&quot;))); &quot; &quot;; &quot;,&quot;)" office:value-type="string" office:string-value="C113" calcext:value-type="string">
            <text:p>C113</text:p>
          </table:table-cell>
          <table:table-cell table:formula="of:=SUBSTITUTE(TRIM(COM.MICROSOFT.CONCAT(IF([$C111.$F5]=[.D$2];[$C111.$B$1] &amp; &quot; &quot;; &quot;&quot;); IF([$C112.$F5]=[.D$2];[$C112.$B$1] &amp; &quot; &quot;; &quot;&quot;); IF([$C113.$F5]=[.D$2];[$C113.$B$1] &amp; &quot; &quot;; &quot;&quot;))); &quot; &quot;; &quot;,&quot;)">
            <text:p/>
          </table:table-cell>
          <table:table-cell table:formula="of:=SUBSTITUTE(TRIM(COM.MICROSOFT.CONCAT(IF([$C111.$F5]=[.E$2];[$C111.$B$1] &amp; &quot; &quot;; &quot;&quot;); IF([$C112.$F5]=[.E$2];[$C112.$B$1] &amp; &quot; &quot;; &quot;&quot;); IF([$C113.$F5]=[.E$2];[$C113.$B$1] &amp; &quot; &quot;; &quot;&quot;))); &quot; &quot;; &quot;,&quot;)">
            <text:p/>
          </table:table-cell>
          <table:table-cell table:formula="of:=SUBSTITUTE(TRIM(COM.MICROSOFT.CONCAT(IF([$C111.$F5]=[.F$2];[$C111.$B$1] &amp; &quot; &quot;; &quot;&quot;); IF([$C112.$F5]=[.F$2];[$C112.$B$1] &amp; &quot; &quot;; &quot;&quot;); IF([$C113.$F5]=[.F$2];[$C113.$B$1] &amp; &quot; &quot;; &quot;&quot;))); &quot; &quot;; &quot;,&quot;)">
            <text:p/>
          </table:table-cell>
          <table:table-cell table:formula="of:=SUBSTITUTE(TRIM(COM.MICROSOFT.CONCAT(IF([$C111.$F5]=[.G$2];[$C111.$B$1] &amp; &quot; &quot;; &quot;&quot;); IF([$C112.$F5]=[.G$2];[$C112.$B$1] &amp; &quot; &quot;; &quot;&quot;); IF([$C113.$F5]=[.G$2];[$C113.$B$1] &amp; &quot; &quot;; &quot;&quot;))); &quot; &quot;; &quot;,&quot;)" office:value-type="string" office:string-value="C112" calcext:value-type="string">
            <text:p>C112</text:p>
          </table:table-cell>
          <table:table-cell table:formula="of:=SUBSTITUTE(TRIM(COM.MICROSOFT.CONCAT(IF([$C111.$F5]=[.H$2];[$C111.$B$1] &amp; &quot; &quot;; &quot;&quot;); IF([$C112.$F5]=[.H$2];[$C112.$B$1] &amp; &quot; &quot;; &quot;&quot;); IF([$C113.$F5]=[.H$2];[$C113.$B$1] &amp; &quot; &quot;; &quot;&quot;))); &quot; &quot;; &quot;,&quot;)" office:value-type="string" office:string-value="C111" calcext:value-type="string">
            <text:p>C111</text:p>
          </table:table-cell>
          <table:table-cell table:formula="of:=SUBSTITUTE(TRIM(COM.MICROSOFT.CONCAT(IF([$C111.$F5]=[.I$2];[$C111.$B$1] &amp; &quot; &quot;; &quot;&quot;); IF([$C112.$F5]=[.I$2];[$C112.$B$1] &amp; &quot; &quot;; &quot;&quot;); IF([$C113.$F5]=[.I$2];[$C113.$B$1] &amp; &quot; &quot;; &quot;&quot;))); &quot; &quot;; &quot;,&quot;)">
            <text:p/>
          </table:table-cell>
          <table:table-cell table:formula="of:=SUBSTITUTE(TRIM(COM.MICROSOFT.CONCAT(IF([$C111.$F5]=[.J$2];[$C111.$B$1] &amp; &quot; &quot;; &quot;&quot;); IF([$C112.$F5]=[.J$2];[$C112.$B$1] &amp; &quot; &quot;; &quot;&quot;); IF([$C113.$F5]=[.J$2];[$C113.$B$1] &amp; &quot; &quot;; &quot;&quot;))); &quot; &quot;; &quot;,&quot;)">
            <text:p/>
          </table:table-cell>
          <table:table-cell table:formula="of:=SUBSTITUTE(TRIM(COM.MICROSOFT.CONCAT(IF([$C111.$F5]=[.K$2];[$C111.$B$1] &amp; &quot; &quot;; &quot;&quot;); IF([$C112.$F5]=[.K$2];[$C112.$B$1] &amp; &quot; &quot;; &quot;&quot;); IF([$C113.$F5]=[.K$2];[$C113.$B$1] &amp; &quot; &quot;; &quot;&quot;))); &quot; &quot;; &quot;,&quot;)">
            <text:p/>
          </table:table-cell>
          <table:table-cell table:formula="of:=SUBSTITUTE(TRIM(COM.MICROSOFT.CONCAT(IF([$C111.$F5]=[.L$2];[$C111.$B$1] &amp; &quot; &quot;; &quot;&quot;); IF([$C112.$F5]=[.L$2];[$C112.$B$1] &amp; &quot; &quot;; &quot;&quot;); IF([$C113.$F5]=[.L$2];[$C113.$B$1] &amp; &quot; &quot;; &quot;&quot;))); &quot; &quot;; &quot;,&quot;)">
            <text:p/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do</text:p>
          </table:table-cell>
          <table:table-cell table:formula="of:=SUBSTITUTE(TRIM(COM.MICROSOFT.CONCAT(IF([$C111.$F7]=[.C$2];[$C111.$B$1] &amp; &quot; &quot;; &quot;&quot;); IF([$C112.$F7]=[.C$2];[$C112.$B$1] &amp; &quot; &quot;; &quot;&quot;); IF([$C113.$F7]=[.C$2];[$C113.$B$1] &amp; &quot; &quot;; &quot;&quot;))); &quot; &quot;; &quot;,&quot;)" office:value-type="string" office:string-value="C113" calcext:value-type="string">
            <text:p>C113</text:p>
          </table:table-cell>
          <table:table-cell table:formula="of:=SUBSTITUTE(TRIM(COM.MICROSOFT.CONCAT(IF([$C111.$F7]=[.D$2];[$C111.$B$1] &amp; &quot; &quot;; &quot;&quot;); IF([$C112.$F7]=[.D$2];[$C112.$B$1] &amp; &quot; &quot;; &quot;&quot;); IF([$C113.$F7]=[.D$2];[$C113.$B$1] &amp; &quot; &quot;; &quot;&quot;))); &quot; &quot;; &quot;,&quot;)">
            <text:p/>
          </table:table-cell>
          <table:table-cell table:formula="of:=SUBSTITUTE(TRIM(COM.MICROSOFT.CONCAT(IF([$C111.$F7]=[.E$2];[$C111.$B$1] &amp; &quot; &quot;; &quot;&quot;); IF([$C112.$F7]=[.E$2];[$C112.$B$1] &amp; &quot; &quot;; &quot;&quot;); IF([$C113.$F7]=[.E$2];[$C113.$B$1] &amp; &quot; &quot;; &quot;&quot;))); &quot; &quot;; &quot;,&quot;)">
            <text:p/>
          </table:table-cell>
          <table:table-cell table:formula="of:=SUBSTITUTE(TRIM(COM.MICROSOFT.CONCAT(IF([$C111.$F7]=[.F$2];[$C111.$B$1] &amp; &quot; &quot;; &quot;&quot;); IF([$C112.$F7]=[.F$2];[$C112.$B$1] &amp; &quot; &quot;; &quot;&quot;); IF([$C113.$F7]=[.F$2];[$C113.$B$1] &amp; &quot; &quot;; &quot;&quot;))); &quot; &quot;; &quot;,&quot;)">
            <text:p/>
          </table:table-cell>
          <table:table-cell table:formula="of:=SUBSTITUTE(TRIM(COM.MICROSOFT.CONCAT(IF([$C111.$F7]=[.G$2];[$C111.$B$1] &amp; &quot; &quot;; &quot;&quot;); IF([$C112.$F7]=[.G$2];[$C112.$B$1] &amp; &quot; &quot;; &quot;&quot;); IF([$C113.$F7]=[.G$2];[$C113.$B$1] &amp; &quot; &quot;; &quot;&quot;))); &quot; &quot;; &quot;,&quot;)" office:value-type="string" office:string-value="C112" calcext:value-type="string">
            <text:p>C112</text:p>
          </table:table-cell>
          <table:table-cell table:formula="of:=SUBSTITUTE(TRIM(COM.MICROSOFT.CONCAT(IF([$C111.$F7]=[.H$2];[$C111.$B$1] &amp; &quot; &quot;; &quot;&quot;); IF([$C112.$F7]=[.H$2];[$C112.$B$1] &amp; &quot; &quot;; &quot;&quot;); IF([$C113.$F7]=[.H$2];[$C113.$B$1] &amp; &quot; &quot;; &quot;&quot;))); &quot; &quot;; &quot;,&quot;)" office:value-type="string" office:string-value="C111" calcext:value-type="string">
            <text:p>C111</text:p>
          </table:table-cell>
          <table:table-cell table:formula="of:=SUBSTITUTE(TRIM(COM.MICROSOFT.CONCAT(IF([$C111.$F7]=[.I$2];[$C111.$B$1] &amp; &quot; &quot;; &quot;&quot;); IF([$C112.$F7]=[.I$2];[$C112.$B$1] &amp; &quot; &quot;; &quot;&quot;); IF([$C113.$F7]=[.I$2];[$C113.$B$1] &amp; &quot; &quot;; &quot;&quot;))); &quot; &quot;; &quot;,&quot;)">
            <text:p/>
          </table:table-cell>
          <table:table-cell table:formula="of:=SUBSTITUTE(TRIM(COM.MICROSOFT.CONCAT(IF([$C111.$F7]=[.J$2];[$C111.$B$1] &amp; &quot; &quot;; &quot;&quot;); IF([$C112.$F7]=[.J$2];[$C112.$B$1] &amp; &quot; &quot;; &quot;&quot;); IF([$C113.$F7]=[.J$2];[$C113.$B$1] &amp; &quot; &quot;; &quot;&quot;))); &quot; &quot;; &quot;,&quot;)">
            <text:p/>
          </table:table-cell>
          <table:table-cell table:formula="of:=SUBSTITUTE(TRIM(COM.MICROSOFT.CONCAT(IF([$C111.$F7]=[.K$2];[$C111.$B$1] &amp; &quot; &quot;; &quot;&quot;); IF([$C112.$F7]=[.K$2];[$C112.$B$1] &amp; &quot; &quot;; &quot;&quot;); IF([$C113.$F7]=[.K$2];[$C113.$B$1] &amp; &quot; &quot;; &quot;&quot;))); &quot; &quot;; &quot;,&quot;)">
            <text:p/>
          </table:table-cell>
          <table:table-cell table:formula="of:=SUBSTITUTE(TRIM(COM.MICROSOFT.CONCAT(IF([$C111.$F7]=[.L$2];[$C111.$B$1] &amp; &quot; &quot;; &quot;&quot;); IF([$C112.$F7]=[.L$2];[$C112.$B$1] &amp; &quot; &quot;; &quot;&quot;); IF([$C113.$F7]=[.L$2];[$C113.$B$1] &amp; &quot; &quot;; &quot;&quot;))); &quot; &quot;; &quot;,&quot;)">
            <text:p/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ro</text:p>
          </table:table-cell>
          <table:table-cell table:formula="of:=SUBSTITUTE(TRIM(COM.MICROSOFT.CONCAT(IF([$C111.$F9]=[.C$2];[$C111.$B$1] &amp; &quot; &quot;; &quot;&quot;); IF([$C112.$F9]=[.C$2];[$C112.$B$1] &amp; &quot; &quot;; &quot;&quot;); IF([$C113.$F9]=[.C$2];[$C113.$B$1] &amp; &quot; &quot;; &quot;&quot;))); &quot; &quot;; &quot;,&quot;)" office:value-type="string" office:string-value="C113" calcext:value-type="string">
            <text:p>C113</text:p>
          </table:table-cell>
          <table:table-cell table:formula="of:=SUBSTITUTE(TRIM(COM.MICROSOFT.CONCAT(IF([$C111.$F9]=[.D$2];[$C111.$B$1] &amp; &quot; &quot;; &quot;&quot;); IF([$C112.$F9]=[.D$2];[$C112.$B$1] &amp; &quot; &quot;; &quot;&quot;); IF([$C113.$F9]=[.D$2];[$C113.$B$1] &amp; &quot; &quot;; &quot;&quot;))); &quot; &quot;; &quot;,&quot;)">
            <text:p/>
          </table:table-cell>
          <table:table-cell table:formula="of:=SUBSTITUTE(TRIM(COM.MICROSOFT.CONCAT(IF([$C111.$F9]=[.E$2];[$C111.$B$1] &amp; &quot; &quot;; &quot;&quot;); IF([$C112.$F9]=[.E$2];[$C112.$B$1] &amp; &quot; &quot;; &quot;&quot;); IF([$C113.$F9]=[.E$2];[$C113.$B$1] &amp; &quot; &quot;; &quot;&quot;))); &quot; &quot;; &quot;,&quot;)">
            <text:p/>
          </table:table-cell>
          <table:table-cell table:formula="of:=SUBSTITUTE(TRIM(COM.MICROSOFT.CONCAT(IF([$C111.$F9]=[.F$2];[$C111.$B$1] &amp; &quot; &quot;; &quot;&quot;); IF([$C112.$F9]=[.F$2];[$C112.$B$1] &amp; &quot; &quot;; &quot;&quot;); IF([$C113.$F9]=[.F$2];[$C113.$B$1] &amp; &quot; &quot;; &quot;&quot;))); &quot; &quot;; &quot;,&quot;)">
            <text:p/>
          </table:table-cell>
          <table:table-cell table:formula="of:=SUBSTITUTE(TRIM(COM.MICROSOFT.CONCAT(IF([$C111.$F9]=[.G$2];[$C111.$B$1] &amp; &quot; &quot;; &quot;&quot;); IF([$C112.$F9]=[.G$2];[$C112.$B$1] &amp; &quot; &quot;; &quot;&quot;); IF([$C113.$F9]=[.G$2];[$C113.$B$1] &amp; &quot; &quot;; &quot;&quot;))); &quot; &quot;; &quot;,&quot;)" office:value-type="string" office:string-value="C112" calcext:value-type="string">
            <text:p>C112</text:p>
          </table:table-cell>
          <table:table-cell table:formula="of:=SUBSTITUTE(TRIM(COM.MICROSOFT.CONCAT(IF([$C111.$F9]=[.H$2];[$C111.$B$1] &amp; &quot; &quot;; &quot;&quot;); IF([$C112.$F9]=[.H$2];[$C112.$B$1] &amp; &quot; &quot;; &quot;&quot;); IF([$C113.$F9]=[.H$2];[$C113.$B$1] &amp; &quot; &quot;; &quot;&quot;))); &quot; &quot;; &quot;,&quot;)" office:value-type="string" office:string-value="C111" calcext:value-type="string">
            <text:p>C111</text:p>
          </table:table-cell>
          <table:table-cell table:formula="of:=SUBSTITUTE(TRIM(COM.MICROSOFT.CONCAT(IF([$C111.$F9]=[.I$2];[$C111.$B$1] &amp; &quot; &quot;; &quot;&quot;); IF([$C112.$F9]=[.I$2];[$C112.$B$1] &amp; &quot; &quot;; &quot;&quot;); IF([$C113.$F9]=[.I$2];[$C113.$B$1] &amp; &quot; &quot;; &quot;&quot;))); &quot; &quot;; &quot;,&quot;)">
            <text:p/>
          </table:table-cell>
          <table:table-cell table:formula="of:=SUBSTITUTE(TRIM(COM.MICROSOFT.CONCAT(IF([$C111.$F9]=[.J$2];[$C111.$B$1] &amp; &quot; &quot;; &quot;&quot;); IF([$C112.$F9]=[.J$2];[$C112.$B$1] &amp; &quot; &quot;; &quot;&quot;); IF([$C113.$F9]=[.J$2];[$C113.$B$1] &amp; &quot; &quot;; &quot;&quot;))); &quot; &quot;; &quot;,&quot;)">
            <text:p/>
          </table:table-cell>
          <table:table-cell table:formula="of:=SUBSTITUTE(TRIM(COM.MICROSOFT.CONCAT(IF([$C111.$F9]=[.K$2];[$C111.$B$1] &amp; &quot; &quot;; &quot;&quot;); IF([$C112.$F9]=[.K$2];[$C112.$B$1] &amp; &quot; &quot;; &quot;&quot;); IF([$C113.$F9]=[.K$2];[$C113.$B$1] &amp; &quot; &quot;; &quot;&quot;))); &quot; &quot;; &quot;,&quot;)">
            <text:p/>
          </table:table-cell>
          <table:table-cell table:formula="of:=SUBSTITUTE(TRIM(COM.MICROSOFT.CONCAT(IF([$C111.$F9]=[.L$2];[$C111.$B$1] &amp; &quot; &quot;; &quot;&quot;); IF([$C112.$F9]=[.L$2];[$C112.$B$1] &amp; &quot; &quot;; &quot;&quot;); IF([$C113.$F9]=[.L$2];[$C113.$B$1] &amp; &quot; &quot;; &quot;&quot;))); &quot; &quot;; &quot;,&quot;)">
            <text:p/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4t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5t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6to</text:p>
          </table:table-cell>
          <table:table-cell table:number-columns-repeated="12"/>
        </table:table-row>
        <table:table-row table:style-name="ro1">
          <table:table-cell/>
          <table:table-cell table:style-name="Default" table:number-columns-repeated="11"/>
          <table:table-cell table:number-columns-repeated="2"/>
        </table:table-row>
        <table:table-row table:style-name="ro1">
          <table:table-cell/>
          <table:table-cell table:style-name="ce64" office:value-type="string" calcext:value-type="string">
            <text:p>Viernes</text:p>
          </table:table-cell>
          <table:table-cell table:style-name="ce64" office:value-type="string" calcext:value-type="string">
            <text:p>Aula 1</text:p>
          </table:table-cell>
          <table:table-cell table:style-name="ce64" office:value-type="string" calcext:value-type="string">
            <text:p>Aula 2</text:p>
          </table:table-cell>
          <table:table-cell table:style-name="ce64" office:value-type="string" calcext:value-type="string">
            <text:p>Aula 3</text:p>
          </table:table-cell>
          <table:table-cell table:style-name="ce64" office:value-type="string" calcext:value-type="string">
            <text:p>Aula 4</text:p>
          </table:table-cell>
          <table:table-cell table:style-name="ce64" office:value-type="string" calcext:value-type="string">
            <text:p>Aula 5</text:p>
          </table:table-cell>
          <table:table-cell table:style-name="ce64" office:value-type="string" calcext:value-type="string">
            <text:p>Aula 6</text:p>
          </table:table-cell>
          <table:table-cell table:style-name="ce64" office:value-type="string" calcext:value-type="string">
            <text:p>Aula 7</text:p>
          </table:table-cell>
          <table:table-cell table:style-name="ce64" office:value-type="string" calcext:value-type="string">
            <text:p>Aula 8</text:p>
          </table:table-cell>
          <table:table-cell table:style-name="ce64" office:value-type="string" calcext:value-type="string">
            <text:p>Aula 9</text:p>
          </table:table-cell>
          <table:table-cell table:style-name="ce64" office:value-type="string" calcext:value-type="string">
            <text:p>La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ro</text:p>
          </table:table-cell>
          <table:table-cell table:formula="of:=SUBSTITUTE(TRIM(COM.MICROSOFT.CONCAT(IF([$C111.$G5]=[.C$2];[$C111.$B$1] &amp; &quot; &quot;; &quot;&quot;); IF([$C112.$G5]=[.C$2];[$C112.$B$1] &amp; &quot; &quot;; &quot;&quot;); IF([$C113.$G5]=[.C$2];[$C113.$B$1] &amp; &quot; &quot;; &quot;&quot;))); &quot; &quot;; &quot;,&quot;)">
            <text:p/>
          </table:table-cell>
          <table:table-cell table:formula="of:=SUBSTITUTE(TRIM(COM.MICROSOFT.CONCAT(IF([$C111.$G5]=[.D$2];[$C111.$B$1] &amp; &quot; &quot;; &quot;&quot;); IF([$C112.$G5]=[.D$2];[$C112.$B$1] &amp; &quot; &quot;; &quot;&quot;); IF([$C113.$G5]=[.D$2];[$C113.$B$1] &amp; &quot; &quot;; &quot;&quot;))); &quot; &quot;; &quot;,&quot;)">
            <text:p/>
          </table:table-cell>
          <table:table-cell table:formula="of:=SUBSTITUTE(TRIM(COM.MICROSOFT.CONCAT(IF([$C111.$G5]=[.E$2];[$C111.$B$1] &amp; &quot; &quot;; &quot;&quot;); IF([$C112.$G5]=[.E$2];[$C112.$B$1] &amp; &quot; &quot;; &quot;&quot;); IF([$C113.$G5]=[.E$2];[$C113.$B$1] &amp; &quot; &quot;; &quot;&quot;))); &quot; &quot;; &quot;,&quot;)">
            <text:p/>
          </table:table-cell>
          <table:table-cell table:formula="of:=SUBSTITUTE(TRIM(COM.MICROSOFT.CONCAT(IF([$C111.$G5]=[.F$2];[$C111.$B$1] &amp; &quot; &quot;; &quot;&quot;); IF([$C112.$G5]=[.F$2];[$C112.$B$1] &amp; &quot; &quot;; &quot;&quot;); IF([$C113.$G5]=[.F$2];[$C113.$B$1] &amp; &quot; &quot;; &quot;&quot;))); &quot; &quot;; &quot;,&quot;)">
            <text:p/>
          </table:table-cell>
          <table:table-cell/>
          <table:table-cell table:formula="of:=SUBSTITUTE(TRIM(COM.MICROSOFT.CONCAT(IF([$C111.$G5]=[.H$2];[$C111.$B$1] &amp; &quot; &quot;; &quot;&quot;); IF([$C112.$G5]=[.H$2];[$C112.$B$1] &amp; &quot; &quot;; &quot;&quot;); IF([$C113.$G5]=[.H$2];[$C113.$B$1] &amp; &quot; &quot;; &quot;&quot;))); &quot; &quot;; &quot;,&quot;)">
            <text:p/>
          </table:table-cell>
          <table:table-cell table:formula="of:=SUBSTITUTE(TRIM(COM.MICROSOFT.CONCAT(IF([$C111.$G5]=[.I$2];[$C111.$B$1] &amp; &quot; &quot;; &quot;&quot;); IF([$C112.$G5]=[.I$2];[$C112.$B$1] &amp; &quot; &quot;; &quot;&quot;); IF([$C113.$G5]=[.I$2];[$C113.$B$1] &amp; &quot; &quot;; &quot;&quot;))); &quot; &quot;; &quot;,&quot;)">
            <text:p/>
          </table:table-cell>
          <table:table-cell table:formula="of:=SUBSTITUTE(TRIM(COM.MICROSOFT.CONCAT(IF([$C111.$G5]=[.J$2];[$C111.$B$1] &amp; &quot; &quot;; &quot;&quot;); IF([$C112.$G5]=[.J$2];[$C112.$B$1] &amp; &quot; &quot;; &quot;&quot;); IF([$C113.$G5]=[.J$2];[$C113.$B$1] &amp; &quot; &quot;; &quot;&quot;))); &quot; &quot;; &quot;,&quot;)">
            <text:p/>
          </table:table-cell>
          <table:table-cell table:formula="of:=SUBSTITUTE(TRIM(COM.MICROSOFT.CONCAT(IF([$C111.$G5]=[.K$2];[$C111.$B$1] &amp; &quot; &quot;; &quot;&quot;); IF([$C112.$G5]=[.K$2];[$C112.$B$1] &amp; &quot; &quot;; &quot;&quot;); IF([$C113.$G5]=[.K$2];[$C113.$B$1] &amp; &quot; &quot;; &quot;&quot;))); &quot; &quot;; &quot;,&quot;)">
            <text:p/>
          </table:table-cell>
          <table:table-cell table:formula="of:=SUBSTITUTE(TRIM(COM.MICROSOFT.CONCAT(IF([$C111.$G5]=[.L$2];[$C111.$B$1] &amp; &quot; &quot;; &quot;&quot;); IF([$C112.$G5]=[.L$2];[$C112.$B$1] &amp; &quot; &quot;; &quot;&quot;); IF([$C113.$G5]=[.L$2];[$C113.$B$1] &amp; &quot; &quot;; &quot;&quot;))); &quot; &quot;; &quot;,&quot;)">
            <text:p/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do</text:p>
          </table:table-cell>
          <table:table-cell table:formula="of:=SUBSTITUTE(TRIM(COM.MICROSOFT.CONCAT(IF([$C111.$G7]=[.C$2];[$C111.$B$1] &amp; &quot; &quot;; &quot;&quot;); IF([$C112.$G7]=[.C$2];[$C112.$B$1] &amp; &quot; &quot;; &quot;&quot;); IF([$C113.$G7]=[.C$2];[$C113.$B$1] &amp; &quot; &quot;; &quot;&quot;))); &quot; &quot;; &quot;,&quot;)">
            <text:p/>
          </table:table-cell>
          <table:table-cell table:formula="of:=SUBSTITUTE(TRIM(COM.MICROSOFT.CONCAT(IF([$C111.$G7]=[.D$2];[$C111.$B$1] &amp; &quot; &quot;; &quot;&quot;); IF([$C112.$G7]=[.D$2];[$C112.$B$1] &amp; &quot; &quot;; &quot;&quot;); IF([$C113.$G7]=[.D$2];[$C113.$B$1] &amp; &quot; &quot;; &quot;&quot;))); &quot; &quot;; &quot;,&quot;)">
            <text:p/>
          </table:table-cell>
          <table:table-cell table:formula="of:=SUBSTITUTE(TRIM(COM.MICROSOFT.CONCAT(IF([$C111.$G7]=[.E$2];[$C111.$B$1] &amp; &quot; &quot;; &quot;&quot;); IF([$C112.$G7]=[.E$2];[$C112.$B$1] &amp; &quot; &quot;; &quot;&quot;); IF([$C113.$G7]=[.E$2];[$C113.$B$1] &amp; &quot; &quot;; &quot;&quot;))); &quot; &quot;; &quot;,&quot;)">
            <text:p/>
          </table:table-cell>
          <table:table-cell table:formula="of:=SUBSTITUTE(TRIM(COM.MICROSOFT.CONCAT(IF([$C111.$G7]=[.F$2];[$C111.$B$1] &amp; &quot; &quot;; &quot;&quot;); IF([$C112.$G7]=[.F$2];[$C112.$B$1] &amp; &quot; &quot;; &quot;&quot;); IF([$C113.$G7]=[.F$2];[$C113.$B$1] &amp; &quot; &quot;; &quot;&quot;))); &quot; &quot;; &quot;,&quot;)">
            <text:p/>
          </table:table-cell>
          <table:table-cell table:formula="of:=SUBSTITUTE(TRIM(COM.MICROSOFT.CONCAT(IF([$C111.$G7]=[.G$2];[$C111.$B$1] &amp; &quot; &quot;; &quot;&quot;); IF([$C112.$G7]=[.G$2];[$C112.$B$1] &amp; &quot; &quot;; &quot;&quot;); IF([$C113.$G7]=[.G$2];[$C113.$B$1] &amp; &quot; &quot;; &quot;&quot;))); &quot; &quot;; &quot;,&quot;)">
            <text:p/>
          </table:table-cell>
          <table:table-cell table:formula="of:=SUBSTITUTE(TRIM(COM.MICROSOFT.CONCAT(IF([$C111.$G7]=[.H$2];[$C111.$B$1] &amp; &quot; &quot;; &quot;&quot;); IF([$C112.$G7]=[.H$2];[$C112.$B$1] &amp; &quot; &quot;; &quot;&quot;); IF([$C113.$G7]=[.H$2];[$C113.$B$1] &amp; &quot; &quot;; &quot;&quot;))); &quot; &quot;; &quot;,&quot;)">
            <text:p/>
          </table:table-cell>
          <table:table-cell table:formula="of:=SUBSTITUTE(TRIM(COM.MICROSOFT.CONCAT(IF([$C111.$G7]=[.I$2];[$C111.$B$1] &amp; &quot; &quot;; &quot;&quot;); IF([$C112.$G7]=[.I$2];[$C112.$B$1] &amp; &quot; &quot;; &quot;&quot;); IF([$C113.$G7]=[.I$2];[$C113.$B$1] &amp; &quot; &quot;; &quot;&quot;))); &quot; &quot;; &quot;,&quot;)">
            <text:p/>
          </table:table-cell>
          <table:table-cell table:formula="of:=SUBSTITUTE(TRIM(COM.MICROSOFT.CONCAT(IF([$C111.$G7]=[.J$2];[$C111.$B$1] &amp; &quot; &quot;; &quot;&quot;); IF([$C112.$G7]=[.J$2];[$C112.$B$1] &amp; &quot; &quot;; &quot;&quot;); IF([$C113.$G7]=[.J$2];[$C113.$B$1] &amp; &quot; &quot;; &quot;&quot;))); &quot; &quot;; &quot;,&quot;)">
            <text:p/>
          </table:table-cell>
          <table:table-cell table:formula="of:=SUBSTITUTE(TRIM(COM.MICROSOFT.CONCAT(IF([$C111.$G7]=[.K$2];[$C111.$B$1] &amp; &quot; &quot;; &quot;&quot;); IF([$C112.$G7]=[.K$2];[$C112.$B$1] &amp; &quot; &quot;; &quot;&quot;); IF([$C113.$G7]=[.K$2];[$C113.$B$1] &amp; &quot; &quot;; &quot;&quot;))); &quot; &quot;; &quot;,&quot;)">
            <text:p/>
          </table:table-cell>
          <table:table-cell table:formula="of:=SUBSTITUTE(TRIM(COM.MICROSOFT.CONCAT(IF([$C111.$G7]=[.L$2];[$C111.$B$1] &amp; &quot; &quot;; &quot;&quot;); IF([$C112.$G7]=[.L$2];[$C112.$B$1] &amp; &quot; &quot;; &quot;&quot;); IF([$C113.$G7]=[.L$2];[$C113.$B$1] &amp; &quot; &quot;; &quot;&quot;))); &quot; &quot;; &quot;,&quot;)" office:value-type="string" office:string-value="C112" calcext:value-type="string">
            <text:p>C1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ro</text:p>
          </table:table-cell>
          <table:table-cell table:formula="of:=SUBSTITUTE(TRIM(COM.MICROSOFT.CONCAT(IF([$C111.$G9]=[.C$2];[$C111.$B$1] &amp; &quot; &quot;; &quot;&quot;); IF([$C112.$G9]=[.C$2];[$C112.$B$1] &amp; &quot; &quot;; &quot;&quot;); IF([$C113.$G9]=[.C$2];[$C113.$B$1] &amp; &quot; &quot;; &quot;&quot;))); &quot; &quot;; &quot;,&quot;)">
            <text:p/>
          </table:table-cell>
          <table:table-cell table:formula="of:=SUBSTITUTE(TRIM(COM.MICROSOFT.CONCAT(IF([$C111.$G9]=[.D$2];[$C111.$B$1] &amp; &quot; &quot;; &quot;&quot;); IF([$C112.$G9]=[.D$2];[$C112.$B$1] &amp; &quot; &quot;; &quot;&quot;); IF([$C113.$G9]=[.D$2];[$C113.$B$1] &amp; &quot; &quot;; &quot;&quot;))); &quot; &quot;; &quot;,&quot;)">
            <text:p/>
          </table:table-cell>
          <table:table-cell table:formula="of:=SUBSTITUTE(TRIM(COM.MICROSOFT.CONCAT(IF([$C111.$G9]=[.E$2];[$C111.$B$1] &amp; &quot; &quot;; &quot;&quot;); IF([$C112.$G9]=[.E$2];[$C112.$B$1] &amp; &quot; &quot;; &quot;&quot;); IF([$C113.$G9]=[.E$2];[$C113.$B$1] &amp; &quot; &quot;; &quot;&quot;))); &quot; &quot;; &quot;,&quot;)">
            <text:p/>
          </table:table-cell>
          <table:table-cell table:formula="of:=SUBSTITUTE(TRIM(COM.MICROSOFT.CONCAT(IF([$C111.$G9]=[.F$2];[$C111.$B$1] &amp; &quot; &quot;; &quot;&quot;); IF([$C112.$G9]=[.F$2];[$C112.$B$1] &amp; &quot; &quot;; &quot;&quot;); IF([$C113.$G9]=[.F$2];[$C113.$B$1] &amp; &quot; &quot;; &quot;&quot;))); &quot; &quot;; &quot;,&quot;)">
            <text:p/>
          </table:table-cell>
          <table:table-cell table:formula="of:=SUBSTITUTE(TRIM(COM.MICROSOFT.CONCAT(IF([$C111.$G9]=[.G$2];[$C111.$B$1] &amp; &quot; &quot;; &quot;&quot;); IF([$C112.$G9]=[.G$2];[$C112.$B$1] &amp; &quot; &quot;; &quot;&quot;); IF([$C113.$G9]=[.G$2];[$C113.$B$1] &amp; &quot; &quot;; &quot;&quot;))); &quot; &quot;; &quot;,&quot;)" office:value-type="string" office:string-value="C111" calcext:value-type="string">
            <text:p>C111</text:p>
          </table:table-cell>
          <table:table-cell table:formula="of:=SUBSTITUTE(TRIM(COM.MICROSOFT.CONCAT(IF([$C111.$G9]=[.H$2];[$C111.$B$1] &amp; &quot; &quot;; &quot;&quot;); IF([$C112.$G9]=[.H$2];[$C112.$B$1] &amp; &quot; &quot;; &quot;&quot;); IF([$C113.$G9]=[.H$2];[$C113.$B$1] &amp; &quot; &quot;; &quot;&quot;))); &quot; &quot;; &quot;,&quot;)">
            <text:p/>
          </table:table-cell>
          <table:table-cell table:formula="of:=SUBSTITUTE(TRIM(COM.MICROSOFT.CONCAT(IF([$C111.$G9]=[.I$2];[$C111.$B$1] &amp; &quot; &quot;; &quot;&quot;); IF([$C112.$G9]=[.I$2];[$C112.$B$1] &amp; &quot; &quot;; &quot;&quot;); IF([$C113.$G9]=[.I$2];[$C113.$B$1] &amp; &quot; &quot;; &quot;&quot;))); &quot; &quot;; &quot;,&quot;)">
            <text:p/>
          </table:table-cell>
          <table:table-cell table:formula="of:=SUBSTITUTE(TRIM(COM.MICROSOFT.CONCAT(IF([$C111.$G9]=[.J$2];[$C111.$B$1] &amp; &quot; &quot;; &quot;&quot;); IF([$C112.$G9]=[.J$2];[$C112.$B$1] &amp; &quot; &quot;; &quot;&quot;); IF([$C113.$G9]=[.J$2];[$C113.$B$1] &amp; &quot; &quot;; &quot;&quot;))); &quot; &quot;; &quot;,&quot;)">
            <text:p/>
          </table:table-cell>
          <table:table-cell table:formula="of:=SUBSTITUTE(TRIM(COM.MICROSOFT.CONCAT(IF([$C111.$G9]=[.K$2];[$C111.$B$1] &amp; &quot; &quot;; &quot;&quot;); IF([$C112.$G9]=[.K$2];[$C112.$B$1] &amp; &quot; &quot;; &quot;&quot;); IF([$C113.$G9]=[.K$2];[$C113.$B$1] &amp; &quot; &quot;; &quot;&quot;))); &quot; &quot;; &quot;,&quot;)">
            <text:p/>
          </table:table-cell>
          <table:table-cell table:formula="of:=SUBSTITUTE(TRIM(COM.MICROSOFT.CONCAT(IF([$C111.$G9]=[.L$2];[$C111.$B$1] &amp; &quot; &quot;; &quot;&quot;); IF([$C112.$G9]=[.L$2];[$C112.$B$1] &amp; &quot; &quot;; &quot;&quot;); IF([$C113.$G9]=[.L$2];[$C113.$B$1] &amp; &quot; &quot;; &quot;&quot;))); &quot; &quot;; &quot;,&quot;)" office:value-type="string" office:string-value="C113" calcext:value-type="string">
            <text:p>C1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4t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5t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6to</text:p>
          </table:table-cell>
          <table:table-cell table:number-columns-repeated="12"/>
        </table:table-row>
        <calcext:conditional-formats>
          <calcext:conditional-format calcext:target-range-address="Aulas.C4:Aulas.L9">
            <calcext:condition calcext:apply-style-name="Card BR" calcext:value="contains-text(&quot;C1&quot;)" calcext:base-cell-address="Aulas.C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Liberation Serif" svg:font-family="'Liberation Serif'" style:font-adornments="Negrito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fo:background-color="#f78538" style:direction="ltr" style:rotation-angle="0"/>
      <style:text-properties fo:color="#000080" style:font-name="Liberation Sans1" fo:font-family="'Liberation Sans'" style:font-style-name="Fett" style:font-family-generic="swiss" style:font-pitch="variable" fo:font-size="10pt" fo:font-style="normal" fo:font-weight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>
      <style:text-properties fo:color="#000000" style:text-outline="true" fo:font-weight="bold"/>
    </style:style>
    <style:style style:name="Background" style:family="table-cell" style:parent-style-name="Default">
      <style:table-cell-properties fo:background-color="#de3017"/>
      <style:text-properties fo:color="#ffffff"/>
    </style:style>
    <style:style style:name="Card" style:family="table-cell" style:parent-style-name="Default">
      <style:table-cell-properties fo:background-color="#ffb573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style:font-name="Liberation Serif1" fo:font-family="'Liberation Serif'" style:font-style-name="Regular" style:font-family-generic="roman" style:font-pitch="variable" fo:font-weight="normal"/>
    </style:style>
    <style:style style:name="Input" style:family="table-cell" style:parent-style-name="Default" style:data-style-name="N10104">
      <style:table-cell-properties fo:background-color="#ffffd1" style:cell-protect="none" style:print-content="true" style:text-align-source="value-type" style:repeat-content="false" fo:border="1.11pt double #000080" style:border-line-width="0.0008in 0.0138in 0.0008in" fo:padding="0.0193in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fo:border-bottom="1.11pt double #000080" style:text-align-source="fix" style:repeat-content="false" fo:border-left="1.11pt double #000000" style:border-line-width="0.0008in 0.0138in 0.0008in" style:direction="ltr" fo:padding="0.0138in" fo:border-right="1.11pt double #000080" style:rotation-angle="0" style:rotation-align="none" fo:border-top="1.11pt double #000080" style:vertical-align="automatic"/>
      <style:paragraph-properties fo:text-align="center"/>
      <style:text-properties fo:color="#de3017" style:font-name="Liberation Serif" fo:font-family="'Liberation Serif'" style:font-style-name="Negrito" style:font-family-generic="roman" style:font-pitch="variable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3">00/00/0000</text:date>, <text:time style:data-style-name="N2" text:time-value="15:41:53.5276189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3T01:14:24.860827390</meta:creation-date>
    <dc:date>2026-07-03T15:46:21.428954090</dc:date>
    <meta:editing-duration>PT6H27M22S</meta:editing-duration>
    <meta:editing-cycles>36</meta:editing-cycles>
    <meta:generator>LibreOffice/24.2.7.2$Linux_X86_64 LibreOffice_project/420$Build-2</meta:generator>
    <meta:document-statistic meta:table-count="4" meta:cell-count="542" meta:object-count="0"/>
  </office:meta>
</office:document-meta>
</file>